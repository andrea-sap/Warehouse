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C00000169339D5AC3C7354EF4.png" manifest:media-type="image/png"/>
  <manifest:file-entry manifest:full-path="Pictures/10000000000002B100000182D875D1EEE6B06565.png" manifest:media-type="image/png"/>
  <manifest:file-entry manifest:full-path="Pictures/1000000100000B04000006DCB6FAFBAEEAE4A1F9.png" manifest:media-type="image/png"/>
  <manifest:file-entry manifest:full-path="Pictures/10000001000005CE000002DDB77D6559284DF794.png" manifest:media-type="image/png"/>
  <manifest:file-entry manifest:full-path="Pictures/10000000000003A4000000A998C19C1EFEB86EE2.png" manifest:media-type="image/png"/>
  <manifest:file-entry manifest:full-path="Pictures/10000000000005640000008E150C1A09B056C1CB.png" manifest:media-type="image/png"/>
  <manifest:file-entry manifest:full-path="Pictures/1000000100000280000001E0A267B8195795698F.png" manifest:media-type="image/png"/>
  <manifest:file-entry manifest:full-path="Pictures/10000000000002E80000009A4ABA367F041A3B03.png" manifest:media-type="image/png"/>
  <manifest:file-entry manifest:full-path="Pictures/1000000000000249000000EB9CDF5599C2242402.png" manifest:media-type="image/png"/>
  <manifest:file-entry manifest:full-path="Pictures/10000001000005CE000002DDB9E58EF11341EF8B.png" manifest:media-type="image/png"/>
  <manifest:file-entry manifest:full-path="Pictures/100000000000034F000000E4566F3D6E4DD0FF54.png" manifest:media-type="image/png"/>
  <manifest:file-entry manifest:full-path="Pictures/100000000000034C000000B0E4F93E5E9A55327D.png" manifest:media-type="image/png"/>
  <manifest:file-entry manifest:full-path="Pictures/100000000000055F0000008A189DA38B994BCB38.png" manifest:media-type="image/png"/>
  <manifest:file-entry manifest:full-path="Pictures/10000001000005CE000002DD98E7E612995778DE.png" manifest:media-type="image/png"/>
  <manifest:file-entry manifest:full-path="Pictures/1000000100000280000001E080227CCB0B91DB97.png" manifest:media-type="image/png"/>
  <manifest:file-entry manifest:full-path="Pictures/1000000000000178000000123E805C7F41BF3B60.png" manifest:media-type="image/png"/>
  <manifest:file-entry manifest:full-path="Pictures/1000000100000280000001E0A023BE3B77614176.png" manifest:media-type="image/png"/>
  <manifest:file-entry manifest:full-path="Pictures/1000000100000280000001E0561A464CC5F309BB.png" manifest:media-type="image/png"/>
  <manifest:file-entry manifest:full-path="Pictures/1000000100000280000001E0D0F3A67A6F314716.png" manifest:media-type="image/png"/>
  <manifest:file-entry manifest:full-path="Pictures/10000001000003E8000002DD4ABFC00726D7D62F.png" manifest:media-type="image/png"/>
  <manifest:file-entry manifest:full-path="Pictures/1000000100000280000001E016611AF89CDFAD77.png" manifest:media-type="image/png"/>
  <manifest:file-entry manifest:full-path="Pictures/10000001000003E8000002DDF1F2297A5CCD12B9.png" manifest:media-type="image/png"/>
  <manifest:file-entry manifest:full-path="Pictures/10000001000003E8000002DD178F77B86B3881F0.png" manifest:media-type="image/png"/>
  <manifest:file-entry manifest:full-path="Pictures/1000000100000280000001E047C7E523D32BB0FC.png" manifest:media-type="image/png"/>
  <manifest:file-entry manifest:full-path="Pictures/100000000000028C0000003D806D3740E22F7C07.png" manifest:media-type="image/png"/>
  <manifest:file-entry manifest:full-path="Pictures/10000001000003E8000002DD48BBBB459ADAA53A.png" manifest:media-type="image/png"/>
  <manifest:file-entry manifest:full-path="Pictures/1000000000000331000001296F9FE426C1FA40F9.png" manifest:media-type="image/png"/>
  <manifest:file-entry manifest:full-path="Pictures/10000001000005CE000002DD3C0FED6DB51D8BDF.png" manifest:media-type="image/png"/>
  <manifest:file-entry manifest:full-path="Pictures/1000000000000254000001A78837A9E6C19D2ECA.png" manifest:media-type="image/png"/>
  <manifest:file-entry manifest:full-path="Pictures/1000000000000424000001D5F63F63E0D23111F9.png" manifest:media-type="image/png"/>
  <manifest:file-entry manifest:full-path="Pictures/100000010000058000000300303EF92011295569.png" manifest:media-type="image/png"/>
  <manifest:file-entry manifest:full-path="Pictures/1000000100000207000001BB9B17533A5688B548.png" manifest:media-type="image/png"/>
  <manifest:file-entry manifest:full-path="Pictures/10000000000002E00000011314926EA58251E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1c6" officeooo:paragraph-rsid="00205f0b"/>
    </style:style>
    <style:style style:name="P2" style:family="paragraph" style:parent-style-name="Standard">
      <style:paragraph-properties fo:text-align="center" style:justify-single-word="false"/>
      <style:text-properties officeooo:rsid="00205f0b" officeooo:paragraph-rsid="00205f0b"/>
    </style:style>
    <style:style style:name="P3" style:family="paragraph" style:parent-style-name="Standard">
      <style:paragraph-properties fo:text-align="center" style:justify-single-word="false"/>
      <style:text-properties fo:font-size="20pt" officeooo:rsid="001fe1c6" officeooo:paragraph-rsid="00205f0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fe1c6" officeooo:paragraph-rsid="00205f0b" style:font-size-asian="26pt" style:font-weight-asian="bold" style:font-size-complex="26pt" style:font-weight-complex="bold"/>
    </style:style>
    <style:style style:name="P5" style:family="paragraph" style:parent-style-name="Heading_20_1">
      <style:paragraph-properties style:writing-mode="lr-tb"/>
      <style:text-properties officeooo:paragraph-rsid="00245026"/>
    </style:style>
    <style:style style:name="P6" style:family="paragraph" style:parent-style-name="Heading_20_2">
      <style:paragraph-properties style:writing-mode="lr-tb"/>
      <style:text-properties officeooo:paragraph-rsid="00245026"/>
    </style:style>
    <style:style style:name="P7" style:family="paragraph" style:parent-style-name="Standard">
      <style:paragraph-properties style:writing-mode="lr-tb"/>
      <style:text-properties officeooo:paragraph-rsid="00245026"/>
    </style:style>
    <style:style style:name="P8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paragraph-rsid="019f0ae7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fo:break-before="page" style:writing-mode="lr-tb"/>
      <style:text-properties officeooo:paragraph-rsid="00245026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0245026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0a2a32f"/>
    </style:style>
    <style:style style:name="P1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13a1851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1445a9e"/>
    </style:style>
    <style:style style:name="P14" style:family="paragraph" style:parent-style-name="Heading_20_1">
      <style:paragraph-properties fo:text-align="center" style:justify-single-word="false" fo:break-before="page" style:writing-mode="lr-tb"/>
      <style:text-properties officeooo:rsid="007e946d" officeooo:paragraph-rsid="007e946d"/>
    </style:style>
    <style:style style:name="P15" style:family="paragraph" style:parent-style-name="Heading_20_1">
      <style:paragraph-properties fo:text-align="center" style:justify-single-word="false" fo:break-before="page" style:writing-mode="lr-tb"/>
      <style:text-properties officeooo:rsid="00a2d7b6" officeooo:paragraph-rsid="00a2d7b6"/>
    </style:style>
    <style:style style:name="P16" style:family="paragraph" style:parent-style-name="Heading_20_1">
      <style:paragraph-properties fo:text-align="center" style:justify-single-word="false" fo:break-before="page" style:writing-mode="lr-tb"/>
      <style:text-properties officeooo:rsid="0134616a" officeooo:paragraph-rsid="0134616a"/>
    </style:style>
    <style:style style:name="P17" style:family="paragraph" style:parent-style-name="Standard">
      <style:paragraph-properties style:writing-mode="lr-tb"/>
      <style:text-properties officeooo:rsid="014286c7" officeooo:paragraph-rsid="014286c7"/>
    </style:style>
    <style:style style:name="P18" style:family="paragraph" style:parent-style-name="Heading_20_1">
      <style:paragraph-properties fo:text-align="center" style:justify-single-word="false" fo:break-before="page" style:writing-mode="lr-tb"/>
      <style:text-properties officeooo:rsid="0145c115" officeooo:paragraph-rsid="0145c115"/>
    </style:style>
    <style:style style:name="P19" style:family="paragraph" style:parent-style-name="Heading_20_1">
      <style:paragraph-properties fo:text-align="center" style:justify-single-word="false" fo:break-before="page" style:writing-mode="lr-tb"/>
      <style:text-properties officeooo:rsid="0156f6a7" officeooo:paragraph-rsid="0156f6a7"/>
    </style:style>
    <style:style style:name="P20" style:family="paragraph" style:parent-style-name="Heading_20_2">
      <style:paragraph-properties style:writing-mode="lr-tb"/>
      <style:text-properties officeooo:paragraph-rsid="00a2a32f"/>
    </style:style>
    <style:style style:name="P21" style:family="paragraph" style:parent-style-name="Standard">
      <style:paragraph-properties style:writing-mode="lr-tb"/>
      <style:text-properties officeooo:paragraph-rsid="00a2a32f"/>
    </style:style>
    <style:style style:name="P22" style:family="paragraph" style:parent-style-name="Heading_20_2">
      <style:paragraph-properties style:writing-mode="lr-tb"/>
      <style:text-properties officeooo:paragraph-rsid="0132a1a3"/>
    </style:style>
    <style:style style:name="P23" style:family="paragraph" style:parent-style-name="Standard">
      <style:paragraph-properties style:writing-mode="lr-tb"/>
      <style:text-properties officeooo:paragraph-rsid="0132a1a3"/>
    </style:style>
    <style:style style:name="P24" style:family="paragraph" style:parent-style-name="Heading_20_2">
      <style:paragraph-properties style:writing-mode="lr-tb"/>
      <style:text-properties officeooo:paragraph-rsid="01445a9e"/>
    </style:style>
    <style:style style:name="P25" style:family="paragraph" style:parent-style-name="Standard">
      <style:paragraph-properties style:writing-mode="lr-tb"/>
      <style:text-properties officeooo:paragraph-rsid="01445a9e"/>
    </style:style>
    <style:style style:name="P26" style:family="paragraph" style:parent-style-name="Heading_20_2">
      <style:paragraph-properties style:writing-mode="lr-tb"/>
      <style:text-properties officeooo:paragraph-rsid="0155419f"/>
    </style:style>
    <style:style style:name="P27" style:family="paragraph" style:parent-style-name="Standard">
      <style:paragraph-properties style:writing-mode="lr-tb"/>
      <style:text-properties officeooo:paragraph-rsid="0155419f"/>
    </style:style>
    <style:style style:name="P28" style:family="paragraph" style:parent-style-name="Standard">
      <style:paragraph-properties fo:text-align="start" style:justify-single-word="false"/>
      <style:text-properties officeooo:rsid="00245026" officeooo:paragraph-rsid="00245026"/>
    </style:style>
    <style:style style:name="P29" style:family="paragraph" style:parent-style-name="Standard">
      <style:paragraph-properties style:writing-mode="lr-tb"/>
      <style:text-properties officeooo:rsid="00245026" officeooo:paragraph-rsid="00998b50"/>
    </style:style>
    <style:style style:name="P30" style:family="paragraph" style:parent-style-name="Standard">
      <style:paragraph-properties fo:text-align="center" style:justify-single-word="false"/>
      <style:text-properties fo:font-size="15pt" officeooo:rsid="00205f0b" officeooo:paragraph-rsid="00205f0b" style:font-size-asian="15pt" style:font-size-complex="15pt"/>
    </style:style>
    <style:style style:name="P31" style:family="paragraph" style:parent-style-name="Standard">
      <style:paragraph-properties style:writing-mode="lr-tb"/>
      <style:text-properties officeooo:paragraph-rsid="0028f684"/>
    </style:style>
    <style:style style:name="P32" style:family="paragraph" style:parent-style-name="Standard">
      <style:paragraph-properties style:writing-mode="lr-tb"/>
      <style:text-properties officeooo:rsid="002ff6b2" officeooo:paragraph-rsid="002ff6b2"/>
    </style:style>
    <style:style style:name="P33" style:family="paragraph" style:parent-style-name="Standard">
      <style:paragraph-properties style:writing-mode="lr-tb"/>
      <style:text-properties officeooo:rsid="002ff6b2" officeooo:paragraph-rsid="003110d8"/>
    </style:style>
    <style:style style:name="P34" style:family="paragraph" style:parent-style-name="Text_20_body">
      <style:paragraph-properties style:writing-mode="lr-tb"/>
      <style:text-properties officeooo:rsid="002ff6b2" officeooo:paragraph-rsid="003110d8"/>
    </style:style>
    <style:style style:name="P35" style:family="paragraph" style:parent-style-name="Standard">
      <style:paragraph-properties style:writing-mode="lr-tb"/>
      <style:text-properties officeooo:rsid="0040dded" officeooo:paragraph-rsid="0040dded"/>
    </style:style>
    <style:style style:name="P36" style:family="paragraph" style:parent-style-name="Standard">
      <style:paragraph-properties style:writing-mode="lr-tb"/>
      <style:text-properties fo:font-size="11pt" officeooo:rsid="002ff6b2" officeooo:paragraph-rsid="003110d8" style:font-size-asian="11pt" style:font-size-complex="11pt"/>
    </style:style>
    <style:style style:name="P37" style:family="paragraph" style:parent-style-name="Standard">
      <style:paragraph-properties style:writing-mode="lr-tb"/>
      <style:text-properties fo:font-weight="bold" officeooo:rsid="002ff6b2" officeooo:paragraph-rsid="002ff6b2" style:font-weight-asian="bold" style:font-weight-complex="bold"/>
    </style:style>
    <style:style style:name="P38" style:family="paragraph" style:parent-style-name="Standard">
      <style:paragraph-properties style:writing-mode="lr-tb"/>
      <style:text-properties fo:font-weight="bold" officeooo:rsid="002ff6b2" officeooo:paragraph-rsid="003110d8" style:font-weight-asian="bold" style:font-weight-complex="bold"/>
    </style:style>
    <style:style style:name="P39" style:family="paragraph" style:parent-style-name="Standard">
      <style:paragraph-properties style:writing-mode="lr-tb"/>
      <style:text-properties fo:font-weight="bold" officeooo:rsid="01382c30" officeooo:paragraph-rsid="01382c30" style:font-weight-asian="bold" style:font-weight-complex="bold"/>
    </style:style>
    <style:style style:name="P40" style:family="paragraph" style:parent-style-name="Standard">
      <style:paragraph-properties style:writing-mode="lr-tb"/>
      <style:text-properties fo:font-weight="normal" officeooo:rsid="0085da48" officeooo:paragraph-rsid="0085da48" style:font-weight-asian="normal" style:font-weight-complex="normal"/>
    </style:style>
    <style:style style:name="P41" style:family="paragraph" style:parent-style-name="Standard">
      <style:paragraph-properties style:writing-mode="lr-tb"/>
      <style:text-properties fo:font-weight="normal" officeooo:rsid="008b0b8b" officeooo:paragraph-rsid="008b0b8b" style:font-weight-asian="normal" style:font-weight-complex="normal"/>
    </style:style>
    <style:style style:name="P42" style:family="paragraph" style:parent-style-name="Standard">
      <style:paragraph-properties style:writing-mode="lr-tb"/>
      <style:text-properties fo:font-weight="normal" officeooo:rsid="0092e698" officeooo:paragraph-rsid="0092e698" style:font-weight-asian="normal" style:font-weight-complex="normal"/>
    </style:style>
    <style:style style:name="P43" style:family="paragraph" style:parent-style-name="Standard">
      <style:paragraph-properties style:writing-mode="lr-tb"/>
      <style:text-properties fo:font-weight="normal" officeooo:rsid="0094adb4" officeooo:paragraph-rsid="0094adb4" style:font-weight-asian="normal" style:font-weight-complex="normal"/>
    </style:style>
    <style:style style:name="P44" style:family="paragraph" style:parent-style-name="Standard">
      <style:paragraph-properties style:writing-mode="lr-tb"/>
      <style:text-properties officeooo:paragraph-rsid="00998b50"/>
    </style:style>
    <style:style style:name="P45" style:family="paragraph" style:parent-style-name="Standard">
      <style:paragraph-properties style:writing-mode="lr-tb"/>
      <style:text-properties officeooo:rsid="00bf8c4c" officeooo:paragraph-rsid="00c14e89"/>
    </style:style>
    <style:style style:name="P46" style:family="paragraph" style:parent-style-name="Standard">
      <style:paragraph-properties style:writing-mode="lr-tb"/>
      <style:text-properties officeooo:rsid="00c4a627" officeooo:paragraph-rsid="00c4a627"/>
    </style:style>
    <style:style style:name="P47" style:family="paragraph" style:parent-style-name="Standard">
      <style:paragraph-properties style:writing-mode="lr-tb"/>
      <style:text-properties officeooo:rsid="00f48e77" officeooo:paragraph-rsid="00f48e77"/>
    </style:style>
    <style:style style:name="P48" style:family="paragraph" style:parent-style-name="Standard">
      <style:paragraph-properties style:writing-mode="lr-tb"/>
      <style:text-properties officeooo:rsid="00f48e77" officeooo:paragraph-rsid="01206eec"/>
    </style:style>
    <style:style style:name="P49" style:family="paragraph" style:parent-style-name="Standard">
      <style:paragraph-properties style:writing-mode="lr-tb"/>
      <style:text-properties officeooo:rsid="00f48e77" officeooo:paragraph-rsid="0123ba93"/>
    </style:style>
    <style:style style:name="P50" style:family="paragraph" style:parent-style-name="Standard">
      <style:paragraph-properties style:writing-mode="lr-tb"/>
      <style:text-properties officeooo:rsid="011824f4" officeooo:paragraph-rsid="011824f4"/>
    </style:style>
    <style:style style:name="P51" style:family="paragraph" style:parent-style-name="Standard">
      <style:paragraph-properties style:writing-mode="lr-tb"/>
      <style:text-properties officeooo:rsid="01483eaf" officeooo:paragraph-rsid="01483eaf"/>
    </style:style>
    <style:style style:name="P52" style:family="paragraph" style:parent-style-name="Standard">
      <style:paragraph-properties style:writing-mode="lr-tb"/>
      <style:text-properties officeooo:rsid="01485f1b" officeooo:paragraph-rsid="01485f1b"/>
    </style:style>
    <style:style style:name="P53" style:family="paragraph" style:parent-style-name="Standard">
      <style:paragraph-properties style:writing-mode="lr-tb"/>
      <style:text-properties officeooo:rsid="014e88bc" officeooo:paragraph-rsid="014e88bc"/>
    </style:style>
    <style:style style:name="P54" style:family="paragraph" style:parent-style-name="Standard">
      <style:paragraph-properties style:writing-mode="lr-tb"/>
      <style:text-properties officeooo:rsid="015a8ec7" officeooo:paragraph-rsid="015a8ec7"/>
    </style:style>
    <style:style style:name="P55" style:family="paragraph" style:parent-style-name="Standard">
      <style:paragraph-properties style:writing-mode="lr-tb"/>
      <style:text-properties officeooo:rsid="01611544" officeooo:paragraph-rsid="01611544"/>
    </style:style>
    <style:style style:name="P56" style:family="paragraph" style:parent-style-name="Standard">
      <style:paragraph-properties style:writing-mode="lr-tb"/>
      <style:text-properties officeooo:rsid="016317e8" officeooo:paragraph-rsid="016317e8"/>
    </style:style>
    <style:style style:name="P57" style:family="paragraph" style:parent-style-name="Standard">
      <style:paragraph-properties style:writing-mode="lr-tb"/>
      <style:text-properties officeooo:rsid="016918bb" officeooo:paragraph-rsid="016918bb"/>
    </style:style>
    <style:style style:name="P58" style:family="paragraph" style:parent-style-name="Standard">
      <style:paragraph-properties style:writing-mode="lr-tb"/>
      <style:text-properties officeooo:rsid="0180055c" officeooo:paragraph-rsid="0180055c"/>
    </style:style>
    <style:style style:name="P59" style:family="paragraph" style:parent-style-name="Standard">
      <style:paragraph-properties style:writing-mode="lr-tb"/>
      <style:text-properties officeooo:rsid="0188ca57" officeooo:paragraph-rsid="0188ca57"/>
    </style:style>
    <style:style style:name="P60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rsid="01a64685" officeooo:paragraph-rsid="01a64685"/>
    </style:style>
    <style:style style:name="P61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rsid="01b1f063" officeooo:paragraph-rsid="01b1f063"/>
    </style:style>
    <style:style style:name="P62" style:family="paragraph" style:parent-style-name="Text_20_body">
      <style:text-properties officeooo:paragraph-rsid="004aac3e"/>
    </style:style>
    <style:style style:name="P63" style:family="paragraph" style:parent-style-name="Text_20_body">
      <style:paragraph-properties style:writing-mode="lr-tb"/>
      <style:text-properties officeooo:paragraph-rsid="01611544"/>
    </style:style>
    <style:style style:name="P64" style:family="paragraph" style:parent-style-name="Heading_20_1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paragraph-rsid="019f0ae7"/>
    </style:style>
    <style:style style:name="P65" style:family="paragraph" style:parent-style-name="Heading_20_1">
      <style:paragraph-properties style:writing-mode="lr-tb"/>
      <style:text-properties officeooo:paragraph-rsid="00245026"/>
    </style:style>
    <style:style style:name="P66" style:family="paragraph" style:parent-style-name="Heading_20_1">
      <style:paragraph-properties style:writing-mode="lr-tb"/>
      <style:text-properties officeooo:rsid="014286c7" officeooo:paragraph-rsid="00245026"/>
    </style:style>
    <style:style style:name="P67" style:family="paragraph" style:parent-style-name="Heading_20_2">
      <style:paragraph-properties style:writing-mode="lr-tb"/>
      <style:text-properties fo:font-size="15pt" officeooo:paragraph-rsid="00a2a32f" style:font-size-asian="15pt" style:font-size-complex="15pt"/>
    </style:style>
    <style:style style:name="P68" style:family="paragraph" style:parent-style-name="Heading_20_2">
      <style:paragraph-properties style:writing-mode="lr-tb"/>
      <style:text-properties fo:font-size="15pt" officeooo:paragraph-rsid="0155419f" style:font-size-asian="15pt" style:font-size-complex="15pt"/>
    </style:style>
    <style:style style:name="P69" style:family="paragraph" style:parent-style-name="Heading_20_2">
      <style:paragraph-properties style:writing-mode="lr-tb"/>
      <style:text-properties officeooo:paragraph-rsid="0155419f"/>
    </style:style>
    <style:style style:name="P70" style:family="paragraph" style:parent-style-name="Standard" style:list-style-name="L1">
      <style:paragraph-properties fo:text-align="center" style:justify-single-word="false"/>
      <style:text-properties fo:font-size="20pt" officeooo:rsid="001fe1c6" officeooo:paragraph-rsid="00205f0b" style:font-size-asian="20pt" style:font-size-complex="20pt"/>
    </style:style>
    <style:style style:name="P71" style:family="paragraph" style:parent-style-name="Standard" style:list-style-name="L1">
      <style:paragraph-properties fo:text-align="center" style:justify-single-word="false"/>
      <style:text-properties officeooo:rsid="001fe1c6" officeooo:paragraph-rsid="00205f0b"/>
    </style:style>
    <style:style style:name="P72" style:family="paragraph" style:parent-style-name="Standard">
      <style:paragraph-properties style:writing-mode="lr-tb"/>
      <style:text-properties fo:font-size="15pt" officeooo:rsid="0028f684" officeooo:paragraph-rsid="0028f684" style:font-size-asian="15pt" style:font-size-complex="15pt"/>
    </style:style>
    <style:style style:name="P73" style:family="paragraph" style:parent-style-name="Standard" style:list-style-name="L2">
      <style:paragraph-properties style:writing-mode="lr-tb"/>
      <style:text-properties fo:font-size="15pt" officeooo:rsid="0028f684" officeooo:paragraph-rsid="0028f684" style:font-size-asian="15pt" style:font-size-complex="15pt"/>
    </style:style>
    <style:style style:name="P74" style:family="paragraph" style:parent-style-name="Standard" style:list-style-name="L2">
      <style:paragraph-properties style:writing-mode="lr-tb"/>
      <style:text-properties fo:font-size="15pt" officeooo:paragraph-rsid="0028f684" style:font-size-asian="15pt" style:font-size-complex="15pt"/>
    </style:style>
    <style:style style:name="P75" style:family="paragraph" style:parent-style-name="Standard">
      <style:paragraph-properties style:writing-mode="lr-tb"/>
      <style:text-properties fo:font-size="15pt" officeooo:paragraph-rsid="0028f684" style:font-size-asian="15pt" style:font-size-complex="15pt"/>
    </style:style>
    <style:style style:name="P76" style:family="paragraph" style:parent-style-name="Standard">
      <style:paragraph-properties style:writing-mode="lr-tb"/>
      <style:text-properties fo:font-size="15pt" officeooo:rsid="002ff6b2" officeooo:paragraph-rsid="002ff6b2" style:font-size-asian="15pt" style:font-size-complex="15pt"/>
    </style:style>
    <style:style style:name="P77" style:family="paragraph" style:parent-style-name="Standard" style:list-style-name="L17">
      <style:paragraph-properties style:writing-mode="lr-tb"/>
      <style:text-properties fo:font-size="15pt" officeooo:rsid="002ff6b2" officeooo:paragraph-rsid="003dec3c" style:font-size-asian="15pt" style:font-size-complex="15pt"/>
    </style:style>
    <style:style style:name="P78" style:family="paragraph" style:parent-style-name="Standard" style:list-style-name="L17">
      <style:paragraph-properties style:writing-mode="lr-tb"/>
      <style:text-properties fo:font-size="15pt" officeooo:rsid="002ff6b2" officeooo:paragraph-rsid="002ff6b2" style:font-size-asian="15pt" style:font-size-complex="15pt"/>
    </style:style>
    <style:style style:name="P79" style:family="paragraph" style:parent-style-name="Standard">
      <style:paragraph-properties style:writing-mode="lr-tb"/>
      <style:text-properties fo:font-size="15pt" officeooo:rsid="002f5b85" officeooo:paragraph-rsid="002f5b85" style:font-size-asian="15pt" style:font-size-complex="15pt"/>
    </style:style>
    <style:style style:name="P80" style:family="paragraph" style:parent-style-name="Standard" style:list-style-name="L15">
      <style:paragraph-properties style:writing-mode="lr-tb"/>
      <style:text-properties fo:font-size="15pt" officeooo:rsid="002f5b85" officeooo:paragraph-rsid="002f5b85" style:font-size-asian="15pt" style:font-size-complex="15pt"/>
    </style:style>
    <style:style style:name="P81" style:family="paragraph" style:parent-style-name="Standard" style:list-style-name="L16">
      <style:paragraph-properties style:writing-mode="lr-tb"/>
      <style:text-properties fo:font-size="15pt" officeooo:rsid="002f5b85" officeooo:paragraph-rsid="002ff6b2" style:font-size-asian="15pt" style:font-size-complex="15pt"/>
    </style:style>
    <style:style style:name="P82" style:family="paragraph" style:parent-style-name="Standard" style:list-style-name="L16">
      <style:paragraph-properties style:writing-mode="lr-tb"/>
      <style:text-properties fo:font-size="15pt" officeooo:rsid="003dec3c" officeooo:paragraph-rsid="003dec3c" style:font-size-asian="15pt" style:font-size-complex="15pt"/>
    </style:style>
    <style:style style:name="P83" style:family="paragraph" style:parent-style-name="Standard" style:list-style-name="L17">
      <style:paragraph-properties style:writing-mode="lr-tb"/>
      <style:text-properties fo:font-size="15pt" officeooo:rsid="00367210" officeooo:paragraph-rsid="003dec3c" style:font-size-asian="15pt" style:font-size-complex="15pt"/>
    </style:style>
    <style:style style:name="P84" style:family="paragraph" style:parent-style-name="Standard" style:list-style-name="L18">
      <style:paragraph-properties fo:text-align="start" style:justify-single-word="false" style:writing-mode="lr-tb"/>
      <style:text-properties fo:font-size="15pt" officeooo:rsid="0064eb0d" officeooo:paragraph-rsid="0064eb0d" style:font-size-asian="15pt" style:font-size-complex="15pt"/>
    </style:style>
    <style:style style:name="P85" style:family="paragraph" style:parent-style-name="Standard" style:list-style-name="L19">
      <style:paragraph-properties fo:text-align="start" style:justify-single-word="false" style:writing-mode="lr-tb"/>
      <style:text-properties fo:font-size="15pt" officeooo:rsid="00677045" officeooo:paragraph-rsid="00677045" style:font-size-asian="15pt" style:font-size-complex="15pt"/>
    </style:style>
    <style:style style:name="P86" style:family="paragraph" style:parent-style-name="Standard" style:list-style-name="L18">
      <style:paragraph-properties fo:text-align="start" style:justify-single-word="false" style:writing-mode="lr-tb"/>
      <style:text-properties fo:font-size="15pt" officeooo:rsid="0065cfeb" officeooo:paragraph-rsid="0065cfeb" style:font-size-asian="15pt" style:font-size-complex="15pt"/>
    </style:style>
    <style:style style:name="P87" style:family="paragraph" style:parent-style-name="Standard">
      <style:paragraph-properties style:writing-mode="lr-tb"/>
      <style:text-properties fo:font-size="15pt" officeooo:rsid="0080066f" officeooo:paragraph-rsid="0080066f" style:font-size-asian="15pt" style:font-size-complex="15pt"/>
    </style:style>
    <style:style style:name="P8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0818d96" officeooo:paragraph-rsid="00818d96" style:font-size-asian="15pt" style:font-size-complex="15pt"/>
    </style:style>
    <style:style style:name="P89" style:family="paragraph" style:parent-style-name="Standard">
      <style:paragraph-properties style:writing-mode="lr-tb"/>
      <style:text-properties fo:font-size="15pt" officeooo:paragraph-rsid="00245026" style:font-size-asian="15pt" style:font-size-complex="15pt"/>
    </style:style>
    <style:style style:name="P90" style:family="paragraph" style:parent-style-name="Standard">
      <style:paragraph-properties style:writing-mode="lr-tb"/>
      <style:text-properties fo:font-size="15pt" officeooo:rsid="00a422ca" officeooo:paragraph-rsid="00a422ca" style:font-size-asian="15pt" style:font-size-complex="15pt"/>
    </style:style>
    <style:style style:name="P9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0a9bd6c" officeooo:paragraph-rsid="00a9bd6c" style:font-size-asian="15pt" style:font-size-complex="15pt"/>
    </style:style>
    <style:style style:name="P9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paragraph-rsid="00a4ea04" style:font-size-asian="15pt" style:font-size-complex="15pt"/>
    </style:style>
    <style:style style:name="P9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paragraph-rsid="015f101e" style:font-size-asian="15pt" style:font-size-complex="15pt"/>
    </style:style>
    <style:style style:name="P9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paragraph-rsid="015a7dae" style:font-size-asian="15pt" style:font-size-complex="15pt"/>
    </style:style>
    <style:style style:name="P9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0a4ea04" officeooo:paragraph-rsid="00a4ea04" style:font-size-asian="15pt" style:font-size-complex="15pt"/>
    </style:style>
    <style:style style:name="P96" style:family="paragraph" style:parent-style-name="Standard">
      <style:paragraph-properties style:writing-mode="lr-tb"/>
      <style:text-properties fo:font-size="15pt" officeooo:paragraph-rsid="00a2a32f" style:font-size-asian="15pt" style:font-size-complex="15pt"/>
    </style:style>
    <style:style style:name="P97" style:family="paragraph" style:parent-style-name="Standard">
      <style:paragraph-properties style:writing-mode="lr-tb"/>
      <style:text-properties fo:font-size="15pt" officeooo:rsid="00aa1bad" officeooo:paragraph-rsid="00aa1bad" style:font-size-asian="15pt" style:font-size-complex="15pt"/>
    </style:style>
    <style:style style:name="P98" style:family="paragraph" style:parent-style-name="Standard">
      <style:paragraph-properties style:writing-mode="lr-tb"/>
      <style:text-properties fo:font-size="15pt" officeooo:rsid="00a73baa" officeooo:paragraph-rsid="00aee6b2" style:font-size-asian="15pt" style:font-size-complex="15pt"/>
    </style:style>
    <style:style style:name="P99" style:family="paragraph" style:parent-style-name="Standard">
      <style:paragraph-properties style:writing-mode="lr-tb"/>
      <style:text-properties fo:font-size="15pt" officeooo:rsid="00a73baa" officeooo:paragraph-rsid="00a8d543" style:font-size-asian="15pt" style:font-size-complex="15pt"/>
    </style:style>
    <style:style style:name="P100" style:family="paragraph" style:parent-style-name="Standard">
      <style:paragraph-properties style:writing-mode="lr-tb"/>
      <style:text-properties fo:font-size="15pt" officeooo:rsid="00b0aaf7" officeooo:paragraph-rsid="00b0aaf7" style:font-size-asian="15pt" style:font-size-complex="15pt"/>
    </style:style>
    <style:style style:name="P101" style:family="paragraph" style:parent-style-name="Standard">
      <style:paragraph-properties style:writing-mode="lr-tb"/>
      <style:text-properties fo:font-size="15pt" officeooo:rsid="00dbf7b1" officeooo:paragraph-rsid="00dbf7b1" style:font-size-asian="15pt" style:font-size-complex="15pt"/>
    </style:style>
    <style:style style:name="P102" style:family="paragraph" style:parent-style-name="Standard">
      <style:paragraph-properties style:writing-mode="lr-tb"/>
      <style:text-properties fo:font-size="15pt" officeooo:rsid="00ba3fe6" officeooo:paragraph-rsid="00aa1bad" style:font-size-asian="15pt" style:font-size-complex="15pt"/>
    </style:style>
    <style:style style:name="P103" style:family="paragraph" style:parent-style-name="Standard">
      <style:paragraph-properties style:writing-mode="lr-tb"/>
      <style:text-properties fo:font-size="15pt" officeooo:rsid="00ba3fe6" officeooo:paragraph-rsid="00ba3fe6" style:font-size-asian="15pt" style:font-size-complex="15pt"/>
    </style:style>
    <style:style style:name="P104" style:family="paragraph" style:parent-style-name="Standard">
      <style:paragraph-properties style:writing-mode="lr-tb"/>
      <style:text-properties fo:font-size="15pt" officeooo:rsid="00aee6b2" officeooo:paragraph-rsid="00aee6b2" style:font-size-asian="15pt" style:font-size-complex="15pt"/>
    </style:style>
    <style:style style:name="P105" style:family="paragraph" style:parent-style-name="Standard">
      <style:paragraph-properties style:writing-mode="lr-tb"/>
      <style:text-properties fo:font-size="15pt" officeooo:rsid="00b65cc2" officeooo:paragraph-rsid="00b65cc2" style:font-size-asian="15pt" style:font-size-complex="15pt"/>
    </style:style>
    <style:style style:name="P106" style:family="paragraph" style:parent-style-name="Standard">
      <style:paragraph-properties style:writing-mode="lr-tb"/>
      <style:text-properties fo:font-size="15pt" officeooo:rsid="00b65cc2" officeooo:paragraph-rsid="00c8eda1" style:font-size-asian="15pt" style:font-size-complex="15pt"/>
    </style:style>
    <style:style style:name="P107" style:family="paragraph" style:parent-style-name="Standard">
      <style:paragraph-properties style:writing-mode="lr-tb"/>
      <style:text-properties fo:font-size="15pt" officeooo:rsid="00bf8c4c" officeooo:paragraph-rsid="00c14e89" style:font-size-asian="15pt" style:font-size-complex="15pt"/>
    </style:style>
    <style:style style:name="P108" style:family="paragraph" style:parent-style-name="Standard">
      <style:paragraph-properties style:writing-mode="lr-tb"/>
      <style:text-properties fo:font-size="15pt" officeooo:rsid="00c4a627" officeooo:paragraph-rsid="00c4a627" style:font-size-asian="15pt" style:font-size-complex="15pt"/>
    </style:style>
    <style:style style:name="P109" style:family="paragraph" style:parent-style-name="Standard">
      <style:paragraph-properties style:writing-mode="lr-tb"/>
      <style:text-properties fo:font-size="15pt" officeooo:rsid="00e90b4b" officeooo:paragraph-rsid="00e90b4b" style:font-size-asian="15pt" style:font-size-complex="15pt"/>
    </style:style>
    <style:style style:name="P110" style:family="paragraph" style:parent-style-name="Standard">
      <style:paragraph-properties style:writing-mode="lr-tb"/>
      <style:text-properties fo:font-size="15pt" officeooo:rsid="00beb374" officeooo:paragraph-rsid="00beb374" style:font-size-asian="15pt" style:font-size-complex="15pt"/>
    </style:style>
    <style:style style:name="P111" style:family="paragraph" style:parent-style-name="Standard">
      <style:paragraph-properties style:writing-mode="lr-tb"/>
      <style:text-properties fo:font-size="15pt" officeooo:rsid="00e0c0af" officeooo:paragraph-rsid="00e0c0af" style:font-size-asian="15pt" style:font-size-complex="15pt"/>
    </style:style>
    <style:style style:name="P112" style:family="paragraph" style:parent-style-name="Standard">
      <style:paragraph-properties style:writing-mode="lr-tb"/>
      <style:text-properties fo:font-size="15pt" officeooo:rsid="0107c9f5" officeooo:paragraph-rsid="010b8bf7" style:font-size-asian="15pt" style:font-size-complex="15pt"/>
    </style:style>
    <style:style style:name="P113" style:family="paragraph" style:parent-style-name="Standard" style:list-style-name="L21">
      <style:paragraph-properties style:writing-mode="lr-tb"/>
      <style:text-properties fo:font-size="15pt" officeooo:rsid="0107c9f5" officeooo:paragraph-rsid="010b8bf7" style:font-size-asian="15pt" style:font-size-complex="15pt"/>
    </style:style>
    <style:style style:name="P114" style:family="paragraph" style:parent-style-name="Standard">
      <style:paragraph-properties style:writing-mode="lr-tb"/>
      <style:text-properties fo:font-size="15pt" officeooo:rsid="00f48e77" officeooo:paragraph-rsid="00f48e77" style:font-size-asian="15pt" style:font-size-complex="15pt"/>
    </style:style>
    <style:style style:name="P115" style:family="paragraph" style:parent-style-name="Standard">
      <style:paragraph-properties style:writing-mode="lr-tb"/>
      <style:text-properties fo:font-size="15pt" officeooo:rsid="00f48e77" officeooo:paragraph-rsid="01220110" style:font-size-asian="15pt" style:font-size-complex="15pt"/>
    </style:style>
    <style:style style:name="P116" style:family="paragraph" style:parent-style-name="Standard">
      <style:paragraph-properties style:writing-mode="lr-tb"/>
      <style:text-properties fo:font-size="15pt" officeooo:rsid="00f48e77" officeooo:paragraph-rsid="0118c5d4" style:font-size-asian="15pt" style:font-size-complex="15pt"/>
    </style:style>
    <style:style style:name="P117" style:family="paragraph" style:parent-style-name="Standard">
      <style:paragraph-properties style:writing-mode="lr-tb"/>
      <style:text-properties fo:font-size="15pt" officeooo:rsid="01115985" officeooo:paragraph-rsid="01115985" style:font-size-asian="15pt" style:font-size-complex="15pt"/>
    </style:style>
    <style:style style:name="P118" style:family="paragraph" style:parent-style-name="Standard">
      <style:paragraph-properties style:writing-mode="lr-tb"/>
      <style:text-properties fo:font-size="15pt" officeooo:rsid="01115985" officeooo:paragraph-rsid="01140084" style:font-size-asian="15pt" style:font-size-complex="15pt"/>
    </style:style>
    <style:style style:name="P119" style:family="paragraph" style:parent-style-name="Standard">
      <style:paragraph-properties style:writing-mode="lr-tb"/>
      <style:text-properties fo:font-size="15pt" officeooo:rsid="0110361c" officeooo:paragraph-rsid="0110361c" style:font-size-asian="15pt" style:font-size-complex="15pt"/>
    </style:style>
    <style:style style:name="P120" style:family="paragraph" style:parent-style-name="Standard">
      <style:paragraph-properties style:writing-mode="lr-tb"/>
      <style:text-properties fo:font-size="15pt" officeooo:rsid="0110361c" officeooo:paragraph-rsid="01140084" style:font-size-asian="15pt" style:font-size-complex="15pt"/>
    </style:style>
    <style:style style:name="P121" style:family="paragraph" style:parent-style-name="Standard">
      <style:paragraph-properties style:writing-mode="lr-tb"/>
      <style:text-properties fo:font-size="15pt" officeooo:rsid="0110361c" officeooo:paragraph-rsid="0118c5d4" style:font-size-asian="15pt" style:font-size-complex="15pt"/>
    </style:style>
    <style:style style:name="P122" style:family="paragraph" style:parent-style-name="Standard">
      <style:paragraph-properties style:writing-mode="lr-tb"/>
      <style:text-properties fo:font-size="15pt" officeooo:rsid="011eae13" officeooo:paragraph-rsid="011eae13" style:font-size-asian="15pt" style:font-size-complex="15pt"/>
    </style:style>
    <style:style style:name="P123" style:family="paragraph" style:parent-style-name="Standard">
      <style:paragraph-properties style:writing-mode="lr-tb"/>
      <style:text-properties fo:font-size="15pt" officeooo:rsid="011eae13" officeooo:paragraph-rsid="01206eec" style:font-size-asian="15pt" style:font-size-complex="15pt"/>
    </style:style>
    <style:style style:name="P124" style:family="paragraph" style:parent-style-name="Standard">
      <style:paragraph-properties style:writing-mode="lr-tb"/>
      <style:text-properties fo:font-size="15pt" officeooo:rsid="011eae13" officeooo:paragraph-rsid="01220110" style:font-size-asian="15pt" style:font-size-complex="15pt"/>
    </style:style>
    <style:style style:name="P125" style:family="paragraph" style:parent-style-name="Standard">
      <style:paragraph-properties style:writing-mode="lr-tb"/>
      <style:text-properties fo:font-size="15pt" officeooo:rsid="011eae13" officeooo:paragraph-rsid="0123ba93" style:font-size-asian="15pt" style:font-size-complex="15pt"/>
    </style:style>
    <style:style style:name="P126" style:family="paragraph" style:parent-style-name="Standard">
      <style:paragraph-properties style:writing-mode="lr-tb"/>
      <style:text-properties fo:font-size="15pt" officeooo:rsid="01259112" officeooo:paragraph-rsid="01259112" style:font-size-asian="15pt" style:font-size-complex="15pt"/>
    </style:style>
    <style:style style:name="P127" style:family="paragraph" style:parent-style-name="Standard">
      <style:paragraph-properties style:writing-mode="lr-tb"/>
      <style:text-properties fo:font-size="15pt" officeooo:rsid="01259112" officeooo:paragraph-rsid="012747b7" style:font-size-asian="15pt" style:font-size-complex="15pt"/>
    </style:style>
    <style:style style:name="P128" style:family="paragraph" style:parent-style-name="Standard">
      <style:paragraph-properties style:writing-mode="lr-tb"/>
      <style:text-properties fo:font-size="15pt" officeooo:rsid="01259112" officeooo:paragraph-rsid="01290227" style:font-size-asian="15pt" style:font-size-complex="15pt"/>
    </style:style>
    <style:style style:name="P129" style:family="paragraph" style:parent-style-name="Standard">
      <style:paragraph-properties style:writing-mode="lr-tb"/>
      <style:text-properties fo:font-size="15pt" officeooo:rsid="01259112" officeooo:paragraph-rsid="012997c5" style:font-size-asian="15pt" style:font-size-complex="15pt"/>
    </style:style>
    <style:style style:name="P130" style:family="paragraph" style:parent-style-name="Standard">
      <style:paragraph-properties style:writing-mode="lr-tb"/>
      <style:text-properties fo:font-size="15pt" officeooo:rsid="0112b915" officeooo:paragraph-rsid="0112b915" style:font-size-asian="15pt" style:font-size-complex="15pt"/>
    </style:style>
    <style:style style:name="P131" style:family="paragraph" style:parent-style-name="Standard">
      <style:paragraph-properties style:writing-mode="lr-tb"/>
      <style:text-properties fo:font-size="15pt" officeooo:rsid="011824f4" officeooo:paragraph-rsid="0118c5d4" style:font-size-asian="15pt" style:font-size-complex="15pt"/>
    </style:style>
    <style:style style:name="P132" style:family="paragraph" style:parent-style-name="Standard">
      <style:paragraph-properties style:writing-mode="lr-tb"/>
      <style:text-properties fo:font-size="15pt" officeooo:rsid="012e666f" officeooo:paragraph-rsid="012e666f" style:font-size-asian="15pt" style:font-size-complex="15pt"/>
    </style:style>
    <style:style style:name="P133" style:family="paragraph" style:parent-style-name="Standard">
      <style:paragraph-properties style:writing-mode="lr-tb"/>
      <style:text-properties fo:font-size="15pt" officeooo:rsid="0180055c" officeooo:paragraph-rsid="0180055c" style:font-size-asian="15pt" style:font-size-complex="15pt"/>
    </style:style>
    <style:style style:name="P134" style:family="paragraph" style:parent-style-name="Standard">
      <style:paragraph-properties style:writing-mode="lr-tb"/>
      <style:text-properties fo:font-size="15pt" officeooo:paragraph-rsid="00f48e77" style:font-size-asian="15pt" style:font-size-complex="15pt"/>
    </style:style>
    <style:style style:name="P135" style:family="paragraph" style:parent-style-name="Standard">
      <style:paragraph-properties style:writing-mode="lr-tb"/>
      <style:text-properties fo:font-size="15pt" officeooo:rsid="0180ec9d" officeooo:paragraph-rsid="0180ec9d" style:font-size-asian="15pt" style:font-size-complex="15pt"/>
    </style:style>
    <style:style style:name="P136" style:family="paragraph" style:parent-style-name="Standard">
      <style:paragraph-properties style:writing-mode="lr-tb"/>
      <style:text-properties fo:font-size="15pt" officeooo:rsid="01346e9d" officeooo:paragraph-rsid="01346e9d" style:font-size-asian="15pt" style:font-size-complex="15pt"/>
    </style:style>
    <style:style style:name="P13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34a7bd" officeooo:paragraph-rsid="0134a7bd" style:font-size-asian="15pt" style:font-size-complex="15pt"/>
    </style:style>
    <style:style style:name="P138" style:family="paragraph" style:parent-style-name="Standard">
      <style:paragraph-properties style:writing-mode="lr-tb"/>
      <style:text-properties fo:font-size="15pt" officeooo:paragraph-rsid="0132a1a3" style:font-size-asian="15pt" style:font-size-complex="15pt"/>
    </style:style>
    <style:style style:name="P139" style:family="paragraph" style:parent-style-name="Standard">
      <style:paragraph-properties style:writing-mode="lr-tb"/>
      <style:text-properties fo:font-size="15pt" officeooo:rsid="013f9de3" officeooo:paragraph-rsid="013f9de3" style:font-size-asian="15pt" style:font-size-complex="15pt"/>
    </style:style>
    <style:style style:name="P14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372ff2" officeooo:paragraph-rsid="013bbf84" style:font-size-asian="15pt" style:font-size-complex="15pt"/>
    </style:style>
    <style:style style:name="P141" style:family="paragraph" style:parent-style-name="Standard">
      <style:paragraph-properties style:writing-mode="lr-tb"/>
      <style:text-properties fo:font-size="15pt" officeooo:paragraph-rsid="013bbf84" style:font-size-asian="15pt" style:font-size-complex="15pt"/>
    </style:style>
    <style:style style:name="P142" style:family="paragraph" style:parent-style-name="Standard">
      <style:paragraph-properties style:writing-mode="lr-tb"/>
      <style:text-properties fo:font-size="15pt" officeooo:rsid="0143204d" officeooo:paragraph-rsid="0143204d" style:font-size-asian="15pt" style:font-size-complex="15pt"/>
    </style:style>
    <style:style style:name="P143" style:family="paragraph" style:parent-style-name="Standard">
      <style:paragraph-properties style:writing-mode="lr-tb"/>
      <style:text-properties fo:font-size="15pt" officeooo:rsid="0143137c" officeooo:paragraph-rsid="0143137c" style:font-size-asian="15pt" style:font-size-complex="15pt"/>
    </style:style>
    <style:style style:name="P14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d3fb43" officeooo:paragraph-rsid="01d3fb43" style:font-size-asian="15pt" style:font-size-complex="15pt"/>
    </style:style>
    <style:style style:name="P145" style:family="paragraph" style:parent-style-name="Standard">
      <style:paragraph-properties style:writing-mode="lr-tb"/>
      <style:text-properties fo:font-size="15pt" officeooo:rsid="01483eaf" officeooo:paragraph-rsid="01483eaf" style:font-size-asian="15pt" style:font-size-complex="15pt"/>
    </style:style>
    <style:style style:name="P146" style:family="paragraph" style:parent-style-name="Standard">
      <style:paragraph-properties style:writing-mode="lr-tb"/>
      <style:text-properties fo:font-size="15pt" officeooo:rsid="01485f1b" officeooo:paragraph-rsid="01485f1b" style:font-size-asian="15pt" style:font-size-complex="15pt"/>
    </style:style>
    <style:style style:name="P14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5pt" officeooo:rsid="014a8638" officeooo:paragraph-rsid="014a8638" style:font-size-asian="15pt" style:font-size-complex="15pt"/>
    </style:style>
    <style:style style:name="P148" style:family="paragraph" style:parent-style-name="Standard">
      <style:paragraph-properties style:writing-mode="lr-tb"/>
      <style:text-properties fo:font-size="15pt" officeooo:rsid="014a8638" officeooo:paragraph-rsid="014a8638" style:font-size-asian="15pt" style:font-size-complex="15pt"/>
    </style:style>
    <style:style style:name="P149" style:family="paragraph" style:parent-style-name="Standard">
      <style:paragraph-properties style:writing-mode="lr-tb"/>
      <style:text-properties fo:font-size="15pt" officeooo:rsid="014e88bc" officeooo:paragraph-rsid="014e88bc" style:font-size-asian="15pt" style:font-size-complex="15pt"/>
    </style:style>
    <style:style style:name="P150" style:family="paragraph" style:parent-style-name="Standard">
      <style:paragraph-properties style:writing-mode="lr-tb"/>
      <style:text-properties fo:font-size="15pt" officeooo:rsid="0159bf15" officeooo:paragraph-rsid="0159bf15" style:font-size-asian="15pt" style:font-size-complex="15pt"/>
    </style:style>
    <style:style style:name="P151" style:family="paragraph" style:parent-style-name="Standard">
      <style:paragraph-properties style:writing-mode="lr-tb"/>
      <style:text-properties fo:font-size="15pt" officeooo:paragraph-rsid="0155419f" style:font-size-asian="15pt" style:font-size-complex="15pt"/>
    </style:style>
    <style:style style:name="P152" style:family="paragraph" style:parent-style-name="Standard">
      <style:paragraph-properties style:writing-mode="lr-tb"/>
      <style:text-properties fo:font-size="15pt" officeooo:rsid="015a8ec7" officeooo:paragraph-rsid="015a8ec7" style:font-size-asian="15pt" style:font-size-complex="15pt"/>
    </style:style>
    <style:style style:name="P153" style:family="paragraph" style:parent-style-name="Standard">
      <style:paragraph-properties style:writing-mode="lr-tb"/>
      <style:text-properties fo:font-size="15pt" officeooo:rsid="01611544" officeooo:paragraph-rsid="01611544" style:font-size-asian="15pt" style:font-size-complex="15pt"/>
    </style:style>
    <style:style style:name="P154" style:family="paragraph" style:parent-style-name="Standard">
      <style:paragraph-properties style:writing-mode="lr-tb"/>
      <style:text-properties fo:font-size="15pt" officeooo:rsid="016317e8" officeooo:paragraph-rsid="016317e8" style:font-size-asian="15pt" style:font-size-complex="15pt"/>
    </style:style>
    <style:style style:name="P155" style:family="paragraph" style:parent-style-name="Standard">
      <style:paragraph-properties style:writing-mode="lr-tb"/>
      <style:text-properties fo:font-size="15pt" officeooo:rsid="017400ef" officeooo:paragraph-rsid="017400ef" style:font-size-asian="15pt" style:font-size-complex="15pt"/>
    </style:style>
    <style:style style:name="P156" style:family="paragraph" style:parent-style-name="Standard">
      <style:paragraph-properties style:writing-mode="lr-tb"/>
      <style:text-properties fo:font-size="15pt" officeooo:rsid="01740248" officeooo:paragraph-rsid="01740248" style:font-size-asian="15pt" style:font-size-complex="15pt"/>
    </style:style>
    <style:style style:name="P157" style:family="paragraph" style:parent-style-name="Standard">
      <style:paragraph-properties style:writing-mode="lr-tb"/>
      <style:text-properties fo:font-size="15pt" officeooo:rsid="01881115" officeooo:paragraph-rsid="01881115" style:font-size-asian="15pt" style:font-size-complex="15pt"/>
    </style:style>
    <style:style style:name="P158" style:family="paragraph" style:parent-style-name="Standard">
      <style:paragraph-properties fo:line-height="115%" style:writing-mode="lr-tb"/>
      <style:text-properties fo:font-size="15pt" officeooo:rsid="01881115" officeooo:paragraph-rsid="01881115" style:font-size-asian="15pt" style:font-size-complex="15pt"/>
    </style:style>
    <style:style style:name="P159" style:family="paragraph" style:parent-style-name="Standard">
      <style:paragraph-properties style:writing-mode="lr-tb"/>
      <style:text-properties fo:font-size="15pt" officeooo:rsid="0188ca57" officeooo:paragraph-rsid="0188ca57" style:font-size-asian="15pt" style:font-size-complex="15pt"/>
    </style:style>
    <style:style style:name="P160" style:family="paragraph" style:parent-style-name="Standard">
      <style:paragraph-properties fo:line-height="115%" style:writing-mode="lr-tb"/>
      <style:text-properties fo:font-size="15pt" officeooo:rsid="0188ca57" officeooo:paragraph-rsid="01e680df" style:font-size-asian="15pt" style:font-size-complex="15pt"/>
    </style:style>
    <style:style style:name="P161" style:family="paragraph" style:parent-style-name="Standard" style:list-style-name="L20">
      <style:paragraph-properties fo:line-height="115%" style:writing-mode="lr-tb"/>
      <style:text-properties fo:font-size="15pt" officeooo:rsid="0188ca57" officeooo:paragraph-rsid="01e680df" style:font-size-asian="15pt" style:font-size-complex="15pt"/>
    </style:style>
    <style:style style:name="P162" style:family="paragraph" style:parent-style-name="Standard">
      <style:paragraph-properties style:writing-mode="lr-tb"/>
      <style:text-properties fo:font-size="15pt" officeooo:rsid="02198621" officeooo:paragraph-rsid="02198621" style:font-size-asian="15pt" style:font-size-complex="15pt"/>
    </style:style>
    <style:style style:name="P163" style:family="paragraph" style:parent-style-name="Standard" style:list-style-name="L2">
      <style:paragraph-properties style:writing-mode="lr-tb"/>
      <style:text-properties fo:font-size="15pt" fo:font-weight="bold" officeooo:rsid="0028f684" officeooo:paragraph-rsid="0028f684" style:font-size-asian="15pt" style:font-weight-asian="bold" style:font-size-complex="15pt" style:font-weight-complex="bold"/>
    </style:style>
    <style:style style:name="P164" style:family="paragraph" style:parent-style-name="Standard" style:list-style-name="L18">
      <style:paragraph-properties fo:text-align="start" style:justify-single-word="false" style:writing-mode="lr-tb"/>
      <style:text-properties fo:font-size="15pt" fo:font-weight="bold" officeooo:rsid="0064eb0d" officeooo:paragraph-rsid="0064eb0d" style:font-size-asian="15pt" style:font-weight-asian="bold" style:font-size-complex="15pt" style:font-weight-complex="bold"/>
    </style:style>
    <style:style style:name="P165" style:family="paragraph" style:parent-style-name="Standard">
      <style:paragraph-properties fo:text-align="start" style:justify-single-word="false" style:writing-mode="lr-tb"/>
      <style:text-properties fo:font-size="15pt" fo:font-weight="bold" officeooo:rsid="0064eb0d" officeooo:paragraph-rsid="0064eb0d" style:font-size-asian="15pt" style:font-weight-asian="bold" style:font-size-complex="15pt" style:font-weight-complex="bold"/>
    </style:style>
    <style:style style:name="P166" style:family="paragraph" style:parent-style-name="Standard">
      <style:paragraph-properties fo:text-align="start" style:justify-single-word="false" style:writing-mode="lr-tb"/>
      <style:text-properties fo:font-size="15pt" fo:font-weight="bold" officeooo:rsid="0064eb0d" officeooo:paragraph-rsid="01c29b89" style:font-size-asian="15pt" style:font-weight-asian="bold" style:font-size-complex="15pt" style:font-weight-complex="bold"/>
    </style:style>
    <style:style style:name="P167" style:family="paragraph" style:parent-style-name="Standard" style:list-style-name="L18">
      <style:paragraph-properties fo:text-align="start" style:justify-single-word="false" style:writing-mode="lr-tb"/>
      <style:text-properties fo:font-size="15pt" fo:font-weight="bold" officeooo:rsid="00695097" officeooo:paragraph-rsid="00695097" style:font-size-asian="15pt" style:font-weight-asian="bold" style:font-size-complex="15pt" style:font-weight-complex="bold"/>
    </style:style>
    <style:style style:name="P168" style:family="paragraph" style:parent-style-name="Standard">
      <style:paragraph-properties style:writing-mode="lr-tb"/>
      <style:text-properties fo:font-size="15pt" fo:font-weight="bold" officeooo:rsid="00818d96" officeooo:paragraph-rsid="0084473e" style:font-size-asian="15pt" style:font-weight-asian="bold" style:font-size-complex="15pt" style:font-weight-complex="bold"/>
    </style:style>
    <style:style style:name="P169" style:family="paragraph" style:parent-style-name="Standard">
      <style:paragraph-properties style:writing-mode="lr-tb"/>
      <style:text-properties fo:font-size="15pt" fo:font-weight="bold" officeooo:rsid="00818d96" officeooo:paragraph-rsid="00818d96" style:font-size-asian="15pt" style:font-weight-asian="bold" style:font-size-complex="15pt" style:font-weight-complex="bold"/>
    </style:style>
    <style:style style:name="P170" style:family="paragraph" style:parent-style-name="Standard">
      <style:paragraph-properties style:writing-mode="lr-tb"/>
      <style:text-properties fo:font-size="15pt" fo:font-weight="bold" officeooo:rsid="00ad5c9c" officeooo:paragraph-rsid="00ad5c9c" style:font-size-asian="15pt" style:font-weight-asian="bold" style:font-size-complex="15pt" style:font-weight-complex="bold"/>
    </style:style>
    <style:style style:name="P171" style:family="paragraph" style:parent-style-name="Standard">
      <style:paragraph-properties style:writing-mode="lr-tb"/>
      <style:text-properties fo:font-size="15pt" fo:font-weight="bold" officeooo:rsid="0097de76" officeooo:paragraph-rsid="0097de76" style:font-size-asian="15pt" style:font-weight-asian="bold" style:font-size-complex="15pt" style:font-weight-complex="bold"/>
    </style:style>
    <style:style style:name="P172" style:family="paragraph" style:parent-style-name="Standard">
      <style:paragraph-properties style:writing-mode="lr-tb"/>
      <style:text-properties fo:font-size="15pt" fo:font-weight="bold" officeooo:rsid="009854a0" officeooo:paragraph-rsid="009854a0" style:font-size-asian="15pt" style:font-weight-asian="bold" style:font-size-complex="15pt" style:font-weight-complex="bold"/>
    </style:style>
    <style:style style:name="P173" style:family="paragraph" style:parent-style-name="Standard">
      <style:paragraph-properties style:writing-mode="lr-tb"/>
      <style:text-properties fo:font-size="15pt" fo:font-weight="bold" officeooo:paragraph-rsid="00a2a32f" style:font-size-asian="15pt" style:font-weight-asian="bold" style:font-size-complex="15pt" style:font-weight-complex="bold"/>
    </style:style>
    <style:style style:name="P174" style:family="paragraph" style:parent-style-name="Standard">
      <style:paragraph-properties style:writing-mode="lr-tb"/>
      <style:text-properties fo:font-size="15pt" fo:font-weight="bold" officeooo:rsid="00a73baa" officeooo:paragraph-rsid="00a8d543" style:font-size-asian="15pt" style:font-weight-asian="bold" style:font-size-complex="15pt" style:font-weight-complex="bold"/>
    </style:style>
    <style:style style:name="P175" style:family="paragraph" style:parent-style-name="Standard">
      <style:paragraph-properties style:writing-mode="lr-tb"/>
      <style:text-properties fo:font-size="15pt" fo:font-weight="bold" officeooo:rsid="00beb374" officeooo:paragraph-rsid="00beb374" style:font-size-asian="15pt" style:font-weight-asian="bold" style:font-size-complex="15pt" style:font-weight-complex="bold"/>
    </style:style>
    <style:style style:name="P176" style:family="paragraph" style:parent-style-name="Standard">
      <style:paragraph-properties style:writing-mode="lr-tb"/>
      <style:text-properties fo:font-size="15pt" fo:font-weight="bold" officeooo:rsid="00f48e77" officeooo:paragraph-rsid="00f48e77" style:font-size-asian="15pt" style:font-weight-asian="bold" style:font-size-complex="15pt" style:font-weight-complex="bold"/>
    </style:style>
    <style:style style:name="P177" style:family="paragraph" style:parent-style-name="Standard">
      <style:paragraph-properties style:writing-mode="lr-tb"/>
      <style:text-properties fo:font-size="15pt" fo:font-weight="bold" officeooo:rsid="01382c30" officeooo:paragraph-rsid="01382c30" style:font-size-asian="15pt" style:font-weight-asian="bold" style:font-size-complex="15pt" style:font-weight-complex="bold"/>
    </style:style>
    <style:style style:name="P178" style:family="paragraph" style:parent-style-name="Standard">
      <style:paragraph-properties style:writing-mode="lr-tb"/>
      <style:text-properties fo:font-size="15pt" fo:font-weight="bold" officeooo:rsid="01e1eedd" officeooo:paragraph-rsid="01e1eedd" style:font-size-asian="15pt" style:font-weight-asian="bold" style:font-size-complex="15pt" style:font-weight-complex="bold"/>
    </style:style>
    <style:style style:name="P179" style:family="paragraph" style:parent-style-name="Standard">
      <style:paragraph-properties style:writing-mode="lr-tb"/>
      <style:text-properties fo:font-size="15pt" fo:font-weight="bold" officeooo:rsid="01e549db" officeooo:paragraph-rsid="01e549db" style:font-size-asian="15pt" style:font-weight-asian="bold" style:font-size-complex="15pt" style:font-weight-complex="bold"/>
    </style:style>
    <style:style style:name="P180" style:family="paragraph" style:parent-style-name="Standard">
      <style:paragraph-properties style:writing-mode="lr-tb"/>
      <style:text-properties fo:font-size="15pt" fo:font-weight="normal" officeooo:rsid="0084473e" officeooo:paragraph-rsid="0084473e" style:font-size-asian="15pt" style:font-weight-asian="normal" style:font-size-complex="15pt" style:font-weight-complex="normal"/>
    </style:style>
    <style:style style:name="P181" style:family="paragraph" style:parent-style-name="Standard">
      <style:paragraph-properties style:writing-mode="lr-tb"/>
      <style:text-properties fo:font-size="15pt" fo:font-weight="normal" officeooo:rsid="0085da48" officeooo:paragraph-rsid="0085da48" style:font-size-asian="15pt" style:font-weight-asian="normal" style:font-size-complex="15pt" style:font-weight-complex="normal"/>
    </style:style>
    <style:style style:name="P182" style:family="paragraph" style:parent-style-name="Standard">
      <style:paragraph-properties style:writing-mode="lr-tb"/>
      <style:text-properties fo:font-size="15pt" fo:font-weight="normal" officeooo:rsid="008b0b8b" officeooo:paragraph-rsid="008b0b8b" style:font-size-asian="15pt" style:font-weight-asian="normal" style:font-size-complex="15pt" style:font-weight-complex="normal"/>
    </style:style>
    <style:style style:name="P183" style:family="paragraph" style:parent-style-name="Standard">
      <style:paragraph-properties style:writing-mode="lr-tb"/>
      <style:text-properties fo:font-size="15pt" fo:font-weight="normal" officeooo:rsid="0092e698" officeooo:paragraph-rsid="0092e698" style:font-size-asian="15pt" style:font-weight-asian="normal" style:font-size-complex="15pt" style:font-weight-complex="normal"/>
    </style:style>
    <style:style style:name="P184" style:family="paragraph" style:parent-style-name="Standard">
      <style:paragraph-properties style:writing-mode="lr-tb"/>
      <style:text-properties fo:font-size="15pt" fo:font-weight="normal" officeooo:rsid="0094adb4" officeooo:paragraph-rsid="0094adb4" style:font-size-asian="15pt" style:font-weight-asian="normal" style:font-size-complex="15pt" style:font-weight-complex="normal"/>
    </style:style>
    <style:style style:name="P185" style:family="paragraph" style:parent-style-name="Standard">
      <style:paragraph-properties style:writing-mode="lr-tb"/>
      <style:text-properties fo:font-size="15pt" fo:font-style="italic" fo:font-weight="normal" officeooo:rsid="00a73baa" officeooo:paragraph-rsid="00b0aaf7" style:font-size-asian="15pt" style:font-style-asian="italic" style:font-weight-asian="normal" style:font-size-complex="15pt" style:font-style-complex="italic" style:font-weight-complex="normal"/>
    </style:style>
    <style:style style:name="P186" style:family="paragraph" style:parent-style-name="Standard">
      <style:paragraph-properties style:writing-mode="lr-tb"/>
      <style:text-properties fo:font-size="15pt" fo:font-style="italic" officeooo:rsid="00b65cc2" officeooo:paragraph-rsid="00b65cc2" style:font-size-asian="15pt" style:font-style-asian="italic" style:font-size-complex="15pt" style:font-style-complex="italic"/>
    </style:style>
    <style:style style:name="P187" style:family="paragraph" style:parent-style-name="Standard">
      <style:paragraph-properties style:writing-mode="lr-tb"/>
      <style:text-properties officeooo:paragraph-rsid="00245026"/>
    </style:style>
    <style:style style:name="P188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style:writing-mode="lr-tb"/>
      <style:text-properties officeooo:paragraph-rsid="019f0ae7"/>
    </style:style>
    <style:style style:name="P189" style:family="paragraph" style:parent-style-name="Standard" style:list-style-name="L18">
      <style:paragraph-properties fo:text-align="start" style:justify-single-word="false" style:writing-mode="lr-tb"/>
      <style:text-properties officeooo:paragraph-rsid="0064eb0d"/>
    </style:style>
    <style:style style:name="P190" style:family="paragraph" style:parent-style-name="Standard">
      <style:paragraph-properties style:writing-mode="lr-tb"/>
      <style:text-properties fo:font-weight="normal" officeooo:rsid="0085da48" officeooo:paragraph-rsid="0085da48" style:font-weight-asian="normal" style:font-weight-complex="normal"/>
    </style:style>
    <style:style style:name="P191" style:family="paragraph" style:parent-style-name="Standard">
      <style:paragraph-properties style:writing-mode="lr-tb"/>
      <style:text-properties officeooo:rsid="00c4a627" officeooo:paragraph-rsid="00c4a627"/>
    </style:style>
    <style:style style:name="P192" style:family="paragraph" style:parent-style-name="Standard">
      <style:paragraph-properties style:writing-mode="lr-tb"/>
      <style:text-properties fo:font-size="16pt" officeooo:rsid="012d0bc9" officeooo:paragraph-rsid="012d0bc9" style:font-size-asian="16pt" style:font-size-complex="16pt"/>
    </style:style>
    <style:style style:name="P193" style:family="paragraph" style:parent-style-name="Standard">
      <style:paragraph-properties style:writing-mode="lr-tb"/>
      <style:text-properties fo:font-size="16pt" fo:font-weight="bold" officeooo:rsid="01611544" officeooo:paragraph-rsid="01611544" style:font-size-asian="16pt" style:font-weight-asian="bold" style:font-size-complex="16pt" style:font-weight-complex="bold"/>
    </style:style>
    <style:style style:name="P194" style:family="paragraph" style:parent-style-name="Standard">
      <style:paragraph-properties style:writing-mode="lr-tb"/>
      <style:text-properties officeooo:paragraph-rsid="014286c7"/>
    </style:style>
    <style:style style:name="P195" style:family="paragraph" style:parent-style-name="Standard">
      <style:paragraph-properties style:writing-mode="lr-tb"/>
      <style:text-properties officeooo:paragraph-rsid="01445a9e"/>
    </style:style>
    <style:style style:name="P196" style:family="paragraph" style:parent-style-name="Standard">
      <style:paragraph-properties style:writing-mode="lr-tb"/>
      <style:text-properties officeooo:rsid="0188ca57" officeooo:paragraph-rsid="0188ca57"/>
    </style:style>
    <style:style style:name="P197" style:family="paragraph" style:parent-style-name="Standard">
      <style:paragraph-properties style:writing-mode="lr-tb"/>
      <style:text-properties officeooo:paragraph-rsid="0155419f"/>
    </style:style>
    <style:style style:name="P198" style:family="paragraph" style:parent-style-name="Standard">
      <style:paragraph-properties style:writing-mode="lr-tb"/>
      <style:text-properties style:font-name="FreeSans" fo:font-size="15pt" officeooo:rsid="016317e8" officeooo:paragraph-rsid="016317e8" style:font-size-asian="15pt" style:font-size-complex="15pt"/>
    </style:style>
    <style:style style:name="P199" style:family="paragraph" style:parent-style-name="Standard">
      <style:paragraph-properties style:writing-mode="lr-tb"/>
      <style:text-properties officeooo:rsid="01483eaf" officeooo:paragraph-rsid="01483eaf"/>
    </style:style>
    <style:style style:name="P200" style:family="paragraph" style:parent-style-name="Standard">
      <style:paragraph-properties style:writing-mode="lr-tb"/>
      <style:text-properties officeooo:paragraph-rsid="0132a1a3"/>
    </style:style>
    <style:style style:name="P201" style:family="paragraph" style:parent-style-name="Standard">
      <style:paragraph-properties style:writing-mode="lr-tb"/>
      <style:text-properties officeooo:rsid="014286c7" officeooo:paragraph-rsid="00245026"/>
    </style:style>
    <style:style style:name="P202" style:family="paragraph" style:parent-style-name="Standard">
      <style:paragraph-properties style:writing-mode="lr-tb"/>
      <style:text-properties officeooo:rsid="00f48e77" officeooo:paragraph-rsid="00f48e77"/>
    </style:style>
    <style:style style:name="P203" style:family="paragraph" style:parent-style-name="Standard">
      <style:paragraph-properties style:writing-mode="lr-tb"/>
      <style:text-properties officeooo:rsid="00f48e77" officeooo:paragraph-rsid="011824f4"/>
    </style:style>
    <style:style style:name="P204" style:family="paragraph" style:parent-style-name="Standard">
      <style:paragraph-properties style:writing-mode="lr-tb"/>
      <style:text-properties officeooo:paragraph-rsid="00a2a32f"/>
    </style:style>
    <style:style style:name="P205" style:family="paragraph" style:parent-style-name="Standard">
      <style:paragraph-properties style:writing-mode="lr-tb"/>
      <style:text-properties officeooo:paragraph-rsid="003110d8"/>
    </style:style>
    <style:style style:name="P206" style:family="paragraph" style:parent-style-name="Standard">
      <style:paragraph-properties fo:text-align="center" style:justify-single-word="false"/>
      <style:text-properties officeooo:paragraph-rsid="00205f0b"/>
    </style:style>
    <style:style style:name="P207" style:family="paragraph" style:parent-style-name="Text_20_body" style:list-style-name="L3"/>
    <style:style style:name="P208" style:family="paragraph" style:parent-style-name="Text_20_body" style:list-style-name="L3">
      <style:text-properties fo:font-size="11pt" style:font-size-asian="11pt" style:font-size-complex="11pt"/>
    </style:style>
    <style:style style:name="P209" style:family="paragraph" style:parent-style-name="Text_20_body" style:list-style-name="L4">
      <style:text-properties fo:font-size="11pt" style:font-size-asian="11pt" style:font-size-complex="11pt"/>
    </style:style>
    <style:style style:name="P210" style:family="paragraph" style:parent-style-name="Text_20_body" style:list-style-name="L5">
      <style:text-properties fo:font-size="11pt" style:font-size-asian="11pt" style:font-size-complex="11pt"/>
    </style:style>
    <style:style style:name="P211" style:family="paragraph" style:parent-style-name="Text_20_body" style:list-style-name="L6">
      <style:text-properties fo:font-size="11pt" style:font-size-asian="11pt" style:font-size-complex="11pt"/>
    </style:style>
    <style:style style:name="P212" style:family="paragraph" style:parent-style-name="Text_20_body" style:list-style-name="L7">
      <style:text-properties fo:font-size="11pt" style:font-size-asian="11pt" style:font-size-complex="11pt"/>
    </style:style>
    <style:style style:name="P213" style:family="paragraph" style:parent-style-name="Text_20_body" style:list-style-name="L8">
      <style:text-properties fo:font-size="11pt" style:font-size-asian="11pt" style:font-size-complex="11pt"/>
    </style:style>
    <style:style style:name="P214" style:family="paragraph" style:parent-style-name="Text_20_body" style:list-style-name="L9">
      <style:text-properties fo:font-size="11pt" style:font-size-asian="11pt" style:font-size-complex="11pt"/>
    </style:style>
    <style:style style:name="P215" style:family="paragraph" style:parent-style-name="Text_20_body" style:list-style-name="L10">
      <style:text-properties fo:font-size="11pt" style:font-size-asian="11pt" style:font-size-complex="11pt"/>
    </style:style>
    <style:style style:name="P216" style:family="paragraph" style:parent-style-name="Text_20_body" style:list-style-name="L11">
      <style:text-properties fo:font-size="11pt" style:font-size-asian="11pt" style:font-size-complex="11pt"/>
    </style:style>
    <style:style style:name="P217" style:family="paragraph" style:parent-style-name="Text_20_body" style:list-style-name="L12">
      <style:text-properties fo:font-size="11pt" style:font-size-asian="11pt" style:font-size-complex="11pt"/>
    </style:style>
    <style:style style:name="P218" style:family="paragraph" style:parent-style-name="Text_20_body" style:list-style-name="L13">
      <style:text-properties fo:font-size="11pt" style:font-size-asian="11pt" style:font-size-complex="11pt"/>
    </style:style>
    <style:style style:name="P219" style:family="paragraph" style:parent-style-name="Text_20_body" style:list-style-name="L14">
      <style:text-properties fo:font-size="11pt" style:font-size-asian="11pt" style:font-size-complex="11pt"/>
    </style:style>
    <style:style style:name="P220" style:family="paragraph" style:parent-style-name="Text_20_body">
      <style:paragraph-properties style:writing-mode="lr-tb"/>
      <style:text-properties fo:font-size="15pt" officeooo:rsid="01798e93" officeooo:paragraph-rsid="01798e93" style:font-size-asian="15pt" style:font-size-complex="15pt"/>
    </style:style>
    <style:style style:name="P221" style:family="paragraph" style:parent-style-name="Text_20_body">
      <style:paragraph-properties style:writing-mode="lr-tb"/>
      <style:text-properties fo:font-size="15pt" officeooo:paragraph-rsid="01611544" style:font-size-asian="15pt" style:font-size-complex="15pt"/>
    </style:style>
    <style:style style:name="P222" style:family="paragraph" style:parent-style-name="Text_20_body">
      <style:paragraph-properties style:writing-mode="lr-tb"/>
      <style:text-properties fo:font-size="15pt" officeooo:paragraph-rsid="0162810b" style:font-size-asian="15pt" style:font-size-complex="15pt"/>
    </style:style>
    <style:style style:name="P223" style:family="paragraph" style:parent-style-name="Text_20_body">
      <style:paragraph-properties style:writing-mode="lr-tb"/>
      <style:text-properties fo:font-size="15pt" officeooo:rsid="016b45ad" officeooo:paragraph-rsid="016b45ad" style:font-size-asian="15pt" style:font-size-complex="15pt"/>
    </style:style>
    <style:style style:name="P224" style:family="paragraph" style:parent-style-name="Text_20_body">
      <style:paragraph-properties style:writing-mode="lr-tb"/>
      <style:text-properties fo:font-size="15pt" officeooo:rsid="016c7646" officeooo:paragraph-rsid="016c7646" style:font-size-asian="15pt" style:font-size-complex="15pt"/>
    </style:style>
    <style:style style:name="P225" style:family="paragraph" style:parent-style-name="Text_20_body">
      <style:paragraph-properties style:writing-mode="lr-tb"/>
      <style:text-properties fo:font-size="15pt" fo:font-weight="bold" officeooo:rsid="016679d0" officeooo:paragraph-rsid="016679d0" style:font-size-asian="15pt" style:font-weight-asian="bold" style:font-size-complex="15pt" style:font-weight-complex="bold"/>
    </style:style>
    <style:style style:name="P226" style:family="paragraph" style:parent-style-name="Text_20_body">
      <style:paragraph-properties style:writing-mode="lr-tb"/>
      <style:text-properties style:font-name="FreeSans" fo:font-size="15pt" officeooo:paragraph-rsid="01611544" style:font-size-asian="15pt" style:font-size-complex="15pt"/>
    </style:style>
    <style:style style:name="P227" style:family="paragraph" style:parent-style-name="Text_20_body">
      <style:paragraph-properties style:writing-mode="lr-tb"/>
      <style:text-properties style:font-name="FreeSans" fo:font-size="15pt" officeooo:rsid="016b45ad" officeooo:paragraph-rsid="016c7646" style:font-size-asian="15pt" style:font-size-complex="15pt"/>
    </style:style>
    <style:style style:name="T1" style:family="text">
      <style:text-properties officeooo:rsid="00205f0b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991f5" style:font-weight-asian="bold" style:font-weight-complex="bold"/>
    </style:style>
    <style:style style:name="T5" style:family="text">
      <style:text-properties fo:font-weight="bold" officeooo:rsid="01be71a8" style:font-weight-asian="bold" style:font-weight-complex="bold"/>
    </style:style>
    <style:style style:name="T6" style:family="text">
      <style:text-properties fo:font-weight="bold" officeooo:rsid="010b8bf7" style:font-weight-asian="bold" style:font-weight-complex="bold"/>
    </style:style>
    <style:style style:name="T7" style:family="text">
      <style:text-properties fo:font-weight="bold" officeooo:rsid="010899f4" style:font-weight-asian="bold" style:font-weight-complex="bold"/>
    </style:style>
    <style:style style:name="T8" style:family="text">
      <style:text-properties fo:font-weight="bold" officeooo:rsid="015f101e" style:font-weight-asian="bold" style:font-weight-complex="bold"/>
    </style:style>
    <style:style style:name="T9" style:family="text">
      <style:text-properties fo:font-weight="bold" officeooo:rsid="0162810b" style:font-weight-asian="bold" style:font-weight-complex="bold"/>
    </style:style>
    <style:style style:name="T10" style:family="text">
      <style:text-properties fo:font-size="11pt" fo:font-weight="bold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8pt" officeooo:rsid="00205f0b" style:font-size-asian="18pt" style:font-size-complex="18pt"/>
    </style:style>
    <style:style style:name="T13" style:family="text">
      <style:text-properties fo:font-size="18pt" fo:font-weight="bold" officeooo:rsid="00205f0b" style:font-size-asian="18pt" style:font-weight-asian="bold" style:font-size-complex="18pt" style:font-weight-complex="bold"/>
    </style:style>
    <style:style style:name="T14" style:family="text">
      <style:text-properties fo:font-size="20pt" officeooo:rsid="00205f0b" style:font-size-asian="20pt" style:font-size-complex="20pt"/>
    </style:style>
    <style:style style:name="T15" style:family="text">
      <style:text-properties officeooo:rsid="0028f684"/>
    </style:style>
    <style:style style:name="T16" style:family="text">
      <style:text-properties officeooo:rsid="0029f8a1"/>
    </style:style>
    <style:style style:name="T17" style:family="text">
      <style:text-properties officeooo:rsid="002ff6b2"/>
    </style:style>
    <style:style style:name="T18" style:family="text">
      <style:text-properties officeooo:rsid="003110d8"/>
    </style:style>
    <style:style style:name="T19" style:family="text">
      <style:text-properties officeooo:rsid="00330e8c"/>
    </style:style>
    <style:style style:name="T20" style:family="text">
      <style:text-properties officeooo:rsid="0033f627"/>
    </style:style>
    <style:style style:name="T21" style:family="text">
      <style:text-properties officeooo:rsid="00357281"/>
    </style:style>
    <style:style style:name="T22" style:family="text">
      <style:text-properties officeooo:rsid="003b3cad"/>
    </style:style>
    <style:style style:name="T23" style:family="text">
      <style:text-properties officeooo:rsid="003d7a4b"/>
    </style:style>
    <style:style style:name="T24" style:family="text">
      <style:text-properties officeooo:rsid="003dec3c"/>
    </style:style>
    <style:style style:name="T25" style:family="text">
      <style:text-properties officeooo:rsid="00420064"/>
    </style:style>
    <style:style style:name="T26" style:family="text">
      <style:text-properties officeooo:rsid="004bed1f"/>
    </style:style>
    <style:style style:name="T27" style:family="text">
      <style:text-properties officeooo:rsid="004c376d"/>
    </style:style>
    <style:style style:name="T28" style:family="text">
      <style:text-properties officeooo:rsid="0067704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677045" style:font-weight-asian="normal" style:font-weight-complex="normal"/>
    </style:style>
    <style:style style:name="T31" style:family="text">
      <style:text-properties fo:font-weight="normal" officeooo:rsid="0084473e" style:font-weight-asian="normal" style:font-weight-complex="normal"/>
    </style:style>
    <style:style style:name="T32" style:family="text">
      <style:text-properties fo:font-weight="normal" officeooo:rsid="008e5d43" style:font-weight-asian="normal" style:font-weight-complex="normal"/>
    </style:style>
    <style:style style:name="T33" style:family="text">
      <style:text-properties fo:font-weight="normal" officeooo:rsid="00907207" style:font-weight-asian="normal" style:font-weight-complex="normal"/>
    </style:style>
    <style:style style:name="T34" style:family="text">
      <style:text-properties fo:font-weight="normal" officeooo:rsid="0090b1f7" style:font-weight-asian="normal" style:font-weight-complex="normal"/>
    </style:style>
    <style:style style:name="T35" style:family="text">
      <style:text-properties fo:font-weight="normal" officeooo:rsid="0090f7e9" style:font-weight-asian="normal" style:font-weight-complex="normal"/>
    </style:style>
    <style:style style:name="T36" style:family="text">
      <style:text-properties fo:font-weight="normal" officeooo:rsid="00ad5c9c" style:font-weight-asian="normal" style:font-weight-complex="normal"/>
    </style:style>
    <style:style style:name="T37" style:family="text">
      <style:text-properties fo:font-weight="normal" officeooo:rsid="0194d856" style:font-weight-asian="normal" style:font-weight-complex="normal"/>
    </style:style>
    <style:style style:name="T38" style:family="text">
      <style:text-properties officeooo:rsid="00797f79"/>
    </style:style>
    <style:style style:name="T39" style:family="text">
      <style:text-properties officeooo:rsid="0080cd4d"/>
    </style:style>
    <style:style style:name="T40" style:family="text">
      <style:text-properties fo:color="#000000" loext:opacity="100%" style:font-name="Liberation Serif" fo:font-size="15pt" officeooo:rsid="00998b50" style:font-size-asian="15pt" style:font-size-complex="15pt"/>
    </style:style>
    <style:style style:name="T4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42" style:family="text">
      <style:text-properties style:font-name="Liberation Serif" fo:font-size="15pt" fo:font-weight="bold" officeooo:rsid="01611544" style:font-size-asian="15pt" style:font-weight-asian="bold" style:font-size-complex="15pt" style:font-weight-complex="bold"/>
    </style:style>
    <style:style style:name="T43" style:family="text">
      <style:text-properties style:font-name="Liberation Serif" fo:font-size="15pt" fo:font-weight="bold" officeooo:rsid="017f23dd" style:font-size-asian="15pt" style:font-weight-asian="bold" style:font-size-complex="15pt" style:font-weight-complex="bold"/>
    </style:style>
    <style:style style:name="T44" style:family="text">
      <style:text-properties officeooo:rsid="00a4ea04"/>
    </style:style>
    <style:style style:name="T45" style:family="text">
      <style:text-properties officeooo:rsid="00a54d46"/>
    </style:style>
    <style:style style:name="T46" style:family="text">
      <style:text-properties officeooo:rsid="00aa1bad"/>
    </style:style>
    <style:style style:name="T47" style:family="text">
      <style:text-properties officeooo:rsid="00aee6b2"/>
    </style:style>
    <style:style style:name="T48" style:family="text">
      <style:text-properties officeooo:rsid="00b0aaf7"/>
    </style:style>
    <style:style style:name="T49" style:family="text">
      <style:text-properties officeooo:rsid="00b2730f"/>
    </style:style>
    <style:style style:name="T50" style:family="text">
      <style:text-properties officeooo:rsid="00b585f2"/>
    </style:style>
    <style:style style:name="T51" style:family="text">
      <style:text-properties officeooo:rsid="00b65cc2"/>
    </style:style>
    <style:style style:name="T52" style:family="text">
      <style:text-properties officeooo:rsid="00bc3dad"/>
    </style:style>
    <style:style style:name="T53" style:family="text">
      <style:text-properties officeooo:rsid="00bc82ee"/>
    </style:style>
    <style:style style:name="T54" style:family="text">
      <style:text-properties officeooo:rsid="00bd00ed"/>
    </style:style>
    <style:style style:name="T55" style:family="text">
      <style:text-properties officeooo:rsid="00c14e89"/>
    </style:style>
    <style:style style:name="T56" style:family="text">
      <style:text-properties officeooo:rsid="00c33bc0"/>
    </style:style>
    <style:style style:name="T57" style:family="text">
      <style:text-properties officeooo:rsid="00c4572d"/>
    </style:style>
    <style:style style:name="T58" style:family="text">
      <style:text-properties officeooo:rsid="00c730fd"/>
    </style:style>
    <style:style style:name="T59" style:family="text">
      <style:text-properties officeooo:rsid="00c8eda1"/>
    </style:style>
    <style:style style:name="T60" style:family="text">
      <style:text-properties officeooo:rsid="00ca8512"/>
    </style:style>
    <style:style style:name="T61" style:family="text">
      <style:text-properties officeooo:rsid="00cacd0f"/>
    </style:style>
    <style:style style:name="T62" style:family="text">
      <style:text-properties officeooo:rsid="00cd6f6d"/>
    </style:style>
    <style:style style:name="T63" style:family="text">
      <style:text-properties officeooo:rsid="00d622c6"/>
    </style:style>
    <style:style style:name="T64" style:family="text">
      <style:text-properties officeooo:rsid="00d76d69"/>
    </style:style>
    <style:style style:name="T65" style:family="text">
      <style:text-properties officeooo:rsid="00dccbd0"/>
    </style:style>
    <style:style style:name="T66" style:family="text">
      <style:text-properties officeooo:rsid="00dd3f32"/>
    </style:style>
    <style:style style:name="T67" style:family="text">
      <style:text-properties officeooo:rsid="00e405c2"/>
    </style:style>
    <style:style style:name="T68" style:family="text">
      <style:text-properties officeooo:rsid="00ee9339"/>
    </style:style>
    <style:style style:name="T69" style:family="text">
      <style:text-properties officeooo:rsid="00eee149"/>
    </style:style>
    <style:style style:name="T70" style:family="text">
      <style:text-properties officeooo:rsid="00f0edd2"/>
    </style:style>
    <style:style style:name="T71" style:family="text">
      <style:text-properties officeooo:rsid="00f22508"/>
    </style:style>
    <style:style style:name="T72" style:family="text">
      <style:text-properties officeooo:rsid="010899f4"/>
    </style:style>
    <style:style style:name="T73" style:family="text">
      <style:text-properties officeooo:rsid="010b8bf7"/>
    </style:style>
    <style:style style:name="T74" style:family="text">
      <style:text-properties officeooo:rsid="010c3e2b"/>
    </style:style>
    <style:style style:name="T75" style:family="text">
      <style:text-properties officeooo:rsid="010de3a4"/>
    </style:style>
    <style:style style:name="T76" style:family="text">
      <style:text-properties officeooo:rsid="01190c31"/>
    </style:style>
    <style:style style:name="T77" style:family="text">
      <style:text-properties officeooo:rsid="013a1851"/>
    </style:style>
    <style:style style:name="T78" style:family="text">
      <style:text-properties officeooo:rsid="013dccc9"/>
    </style:style>
    <style:style style:name="T79" style:family="text">
      <style:text-properties officeooo:rsid="013f66f0"/>
    </style:style>
    <style:style style:name="T80" style:family="text">
      <style:text-properties officeooo:rsid="013f9de3"/>
    </style:style>
    <style:style style:name="T81" style:family="text">
      <style:text-properties officeooo:rsid="014c1dd6"/>
    </style:style>
    <style:style style:name="T82" style:family="text">
      <style:text-properties officeooo:rsid="014d826d"/>
    </style:style>
    <style:style style:name="T83" style:family="text">
      <style:text-properties officeooo:rsid="0150df3c"/>
    </style:style>
    <style:style style:name="T84" style:family="text">
      <style:text-properties officeooo:rsid="0151a297"/>
    </style:style>
    <style:style style:name="T85" style:family="text">
      <style:text-properties officeooo:rsid="015a7dae"/>
    </style:style>
    <style:style style:name="T86" style:family="text">
      <style:text-properties officeooo:rsid="015da2b7"/>
    </style:style>
    <style:style style:name="T87" style:family="text">
      <style:text-properties officeooo:rsid="015f101e"/>
    </style:style>
    <style:style style:name="T88" style:family="text">
      <style:text-properties officeooo:rsid="015f9c83"/>
    </style:style>
    <style:style style:name="T89" style:family="text">
      <style:text-properties officeooo:rsid="0162810b"/>
    </style:style>
    <style:style style:name="T90" style:family="text">
      <style:text-properties officeooo:rsid="016918bb"/>
    </style:style>
    <style:style style:name="T91" style:family="text">
      <style:text-properties officeooo:rsid="016c7646"/>
    </style:style>
    <style:style style:name="T92" style:family="text">
      <style:text-properties officeooo:rsid="016ed33a"/>
    </style:style>
    <style:style style:name="T93" style:family="text">
      <style:text-properties officeooo:rsid="0180055c"/>
    </style:style>
    <style:style style:name="T94" style:family="text">
      <style:text-properties officeooo:rsid="01815bc6"/>
    </style:style>
    <style:style style:name="T95" style:family="text">
      <style:text-properties officeooo:rsid="0181f9ad"/>
    </style:style>
    <style:style style:name="T96" style:family="text">
      <style:text-properties officeooo:rsid="018552aa"/>
    </style:style>
    <style:style style:name="T97" style:family="text">
      <style:text-properties officeooo:rsid="0189781e"/>
    </style:style>
    <style:style style:name="T98" style:family="text">
      <style:text-properties officeooo:rsid="018b4050"/>
    </style:style>
    <style:style style:name="T99" style:family="text">
      <style:text-properties officeooo:rsid="018ecc18"/>
    </style:style>
    <style:style style:name="T100" style:family="text">
      <style:text-properties officeooo:rsid="018ed557"/>
    </style:style>
    <style:style style:name="T101" style:family="text">
      <style:text-properties officeooo:rsid="01911a9c"/>
    </style:style>
    <style:style style:name="T102" style:family="text">
      <style:text-properties officeooo:rsid="01945d97"/>
    </style:style>
    <style:style style:name="T103" style:family="text">
      <style:text-properties officeooo:rsid="0195a25a"/>
    </style:style>
    <style:style style:name="T104" style:family="text">
      <style:text-properties officeooo:rsid="0197fdb2"/>
    </style:style>
    <style:style style:name="T105" style:family="text">
      <style:text-properties officeooo:rsid="0198acfa"/>
    </style:style>
    <style:style style:name="T106" style:family="text">
      <style:text-properties officeooo:rsid="01991672"/>
    </style:style>
    <style:style style:name="T107" style:family="text">
      <style:text-properties officeooo:rsid="019a0e9e"/>
    </style:style>
    <style:style style:name="T108" style:family="text">
      <style:text-properties officeooo:rsid="019a910b"/>
    </style:style>
    <style:style style:name="T109" style:family="text">
      <style:text-properties officeooo:rsid="019c4b29"/>
    </style:style>
    <style:style style:name="T110" style:family="text">
      <style:text-properties officeooo:rsid="01a63fbf"/>
    </style:style>
    <style:style style:name="T111" style:family="text">
      <style:text-properties fo:font-size="15pt" style:font-size-asian="15pt" style:font-size-complex="15pt"/>
    </style:style>
    <style:style style:name="T112" style:family="text">
      <style:text-properties fo:font-size="15pt" officeooo:rsid="014286c7" style:font-size-asian="15pt" style:font-size-complex="15pt"/>
    </style:style>
    <style:style style:name="T113" style:family="text">
      <style:text-properties fo:font-size="15pt" officeooo:rsid="01611544" style:font-size-asian="15pt" style:font-size-complex="15pt"/>
    </style:style>
    <style:style style:name="T114" style:family="text">
      <style:text-properties fo:font-size="15pt" fo:font-weight="bold" officeooo:rsid="01c29b89" style:font-size-asian="15pt" style:font-weight-asian="bold" style:font-size-complex="15pt" style:font-weight-complex="bold"/>
    </style:style>
    <style:style style:name="T115" style:family="text">
      <style:text-properties fo:font-size="15pt" fo:font-weight="bold" officeooo:rsid="0064eb0d" style:font-size-asian="15pt" style:font-weight-asian="bold" style:font-size-complex="15pt" style:font-weight-complex="bold"/>
    </style:style>
    <style:style style:name="T116" style:family="text">
      <style:text-properties officeooo:rsid="01bd9981"/>
    </style:style>
    <style:style style:name="T117" style:family="text">
      <style:text-properties officeooo:rsid="01bfcf34"/>
    </style:style>
    <style:style style:name="T118" style:family="text">
      <style:text-properties officeooo:rsid="01c10f2e"/>
    </style:style>
    <style:style style:name="T119" style:family="text">
      <style:text-properties officeooo:rsid="0065cfeb"/>
    </style:style>
    <style:style style:name="T120" style:family="text">
      <style:text-properties officeooo:rsid="01c29b89"/>
    </style:style>
    <style:style style:name="T121" style:family="text">
      <style:text-properties officeooo:rsid="01d47243"/>
    </style:style>
    <style:style style:name="T122" style:family="text">
      <style:text-properties officeooo:rsid="01d66925"/>
    </style:style>
    <style:style style:name="T123" style:family="text">
      <style:text-properties officeooo:rsid="01d689a6"/>
    </style:style>
    <style:style style:name="T124" style:family="text">
      <style:text-properties officeooo:rsid="01e680df"/>
    </style:style>
    <style:style style:name="T125" style:family="text">
      <style:text-properties officeooo:rsid="01e834a7"/>
    </style:style>
    <style:style style:name="T126" style:family="text">
      <style:text-properties officeooo:rsid="01e8bf52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officeooo:rsid="02147a7d"/>
    </style:style>
    <style:style style:name="T130" style:family="text">
      <style:text-properties officeooo:rsid="0215856d"/>
    </style:style>
    <style:style style:name="T131" style:family="text">
      <style:text-properties officeooo:rsid="021756e7"/>
    </style:style>
    <style:style style:name="T132" style:family="text">
      <style:text-properties officeooo:rsid="021822b3"/>
    </style:style>
    <style:style style:name="T133" style:family="text">
      <style:text-properties officeooo:rsid="0218bbfb"/>
    </style:style>
    <style:style style:name="T134" style:family="text">
      <style:text-properties officeooo:rsid="021bc5ea"/>
    </style:style>
    <style:style style:name="T135" style:family="text">
      <style:text-properties officeooo:rsid="021d30d0"/>
    </style:style>
    <style:style style:name="T136" style:family="text">
      <style:text-properties fo:font-size="16pt" fo:font-weight="bold" officeooo:rsid="00205f0b" style:font-size-asian="16pt" style:font-weight-asian="bold" style:font-size-complex="16pt" style:font-weight-complex="bold"/>
    </style:style>
    <style:style style:name="T137" style:family="text">
      <style:text-properties fo:font-size="16pt" fo:font-weight="normal" officeooo:rsid="022395ef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>Gestione della logistica e decision making per un’azienda</text:p>
      <text:p text:style-name="P1"/>
      <text:p text:style-name="P1"/>
      <text:p text:style-name="P1"><text:span text:style-name="T13">Componenti Gruppo</text:span><text:span text:style-name="T1"> </text:span><text:span text:style-name="T12">(singolo)</text:span></text:p>
      <text:p text:style-name="P3"/>
      <text:list xml:id="list3545146190" text:style-name="L1">
        <text:list-item>
          <text:p text:style-name="P70"><text:span text:style-name="T1">Andrea Sapone</text:span> <text:s/><text:span text:style-name="T1">[MAT. 797897] </text:span></text:p>
          <text:p text:style-name="P70"/>
        </text:list-item>
        <text:list-item>
          <text:p text:style-name="P71"><text:span text:style-name="T14">email: </text:span><text:a xlink:type="simple" xlink:href="mailto:a.sapone7@studenti.uniba.it" text:style-name="Internet_20_link" text:visited-style-name="Visited_20_Internet_20_Link"><text:span text:style-name="T14">a.sapone7@studenti.uniba.it</text:span></text:a></text:p>
        </text:list-item>
      </text:list>
      <text:p text:style-name="P1"/>
      <text:p text:style-name="P1"/>
      <text:p text:style-name="P206"><text:span text:style-name="T136">Link Progetto Github: </text:span><text:a xlink:type="simple" xlink:href="https://github.com/andrea-sap/Warehouse.git" text:style-name="Internet_20_link" text:visited-style-name="Visited_20_Internet_20_Link"><text:span text:style-name="T137">progetto</text:span></text:a></text:p>
      <text:p text:style-name="P2"/>
      <text:p text:style-name="P30">A:A 2025-2026</text:p>
      <text:p text:style-name="P2"/>
      <text:p text:style-name="P2"/>
      <text:p text:style-name="P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Heading_20_1_20_Char">Introduzione</text:span></text:p>
      <text:p text:style-name="P72">Il Dominio del problema è la gestione intelligente di una azienda fornita di magazzino e servizio spedizioni interno.La gestione si divide in due macro categorie:</text:p>
      <text:p text:style-name="P72"/>
      <text:list xml:id="list3950789309" text:style-name="L2">
        <text:list-item>
          <text:p text:style-name="P163">Logistica:</text:p>
        </text:list-item>
      </text:list>
      <text:p text:style-name="P72"><text:s text:c="15"/>- Ricerca del percorso più breve per una consegna</text:p>
      <text:p text:style-name="P72"><text:s text:c="15"/>- Diagnostica guasti al sistema meccanico per elaborazione pacchi</text:p>
      <text:p text:style-name="P72"/>
      <text:list xml:id="list125921047095185" text:continue-numbering="true" text:style-name="L2">
        <text:list-item>
          <text:p text:style-name="P163"><text:span text:style-name="T16">Supporto al </text:span>Decision Making:</text:p>
          <text:p text:style-name="P73"><text:s text:c="3"/>- Segmentazione della clientela per scelte di business mirate</text:p>
          <text:p text:style-name="P74"><text:span text:style-name="T15"><text:s text:c="3"/>- Sistema </text:span><text:span text:style-name="T16">per la predizione delle caratteristiche più probabili per un ordine . es. prezzo, giorni in magazzino,tempi di consegna ecc. </text:span></text:p>
        </text:list-item>
      </text:list>
      <text:p text:style-name="P75"/>
      <text:p text:style-name="P76">Sono presenti <text:span text:style-name="T3">2 </text:span><text:span text:style-name="T4">DATASETS</text:span>:</text:p>
      <text:p text:style-name="P32"/>
      <text:p text:style-name="P32"/>
      <text:p text:style-name="P37">- Dataset non etichettato <text:span text:style-name="T18">che per ogni cliente riporta:</text:span></text:p>
      <text:p text:style-name="P32"/>
      <text:list xml:id="list1942134571" text:style-name="L3">
        <text:list-item>
          <text:p text:style-name="P207"><text:span text:style-name="Source_20_Text"><text:span text:style-name="T10">id</text:span></text:span></text:p>
          <text:list>
            <text:list-item>
              <text:p text:style-name="P208"><text:span text:style-name="T2">Tipo:</text:span> Identificativo unico </text:p>
            </text:list-item>
            <text:list-item>
              <text:p text:style-name="P208"><text:span text:style-name="T2">Descrizione:</text:span> Serve a distinguere univocamente ogni cliente all'interno del dataset..</text:p>
            </text:list-item>
          </text:list>
        </text:list-item>
        <text:list-item>
          <text:p text:style-name="P207"><text:span text:style-name="Source_20_Text"><text:span text:style-name="T10">age</text:span></text:span><text:span text:style-name="T11"> (Età)</text:span></text:p>
          <text:list>
            <text:list-item>
              <text:p text:style-name="P208"><text:span text:style-name="T2">Tipo:</text:span> Numerico continuo/discreto.</text:p>
            </text:list-item>
            <text:list-item>
              <text:p text:style-name="P208"><text:span text:style-name="T2">Descrizione:</text:span> Indica l'età anagrafica del cliente.</text:p>
            </text:list-item>
          </text:list>
        </text:list-item>
        <text:list-item>
          <text:p text:style-name="P207"><text:span text:style-name="Source_20_Text"><text:span text:style-name="T10">gender</text:span></text:span><text:span text:style-name="T11"> (Genere)</text:span></text:p>
          <text:list>
            <text:list-item>
              <text:p text:style-name="P208"><text:span text:style-name="T2">Tipo:</text:span> Categorico (es. Maschio, Femmina, Non binario).</text:p>
            </text:list-item>
            <text:list-item>
              <text:p text:style-name="P208"><text:span text:style-name="T2">Descrizione:</text:span> Il genere del cliente.</text:p>
            </text:list-item>
          </text:list>
        </text:list-item>
        <text:list-item>
          <text:p text:style-name="P207"><text:span text:style-name="Source_20_Text"><text:span text:style-name="T10">income</text:span></text:span><text:span text:style-name="T11"> (Reddito)</text:span></text:p>
          <text:list>
            <text:list-item>
              <text:p text:style-name="P208"><text:span text:style-name="T2">Tipo:</text:span> Numerico continuo.</text:p>
            </text:list-item>
            <text:list-item>
              <text:p text:style-name="P208"><text:span text:style-name="T2">Descrizione:</text:span> Il reddito annuo del cliente.</text:p>
            </text:list-item>
          </text:list>
        </text:list-item>
        <text:list-item>
          <text:p text:style-name="P207"><text:span text:style-name="Source_20_Text"><text:span text:style-name="T10">spending_score</text:span></text:span><text:span text:style-name="T11"> (Punteggio di spesa)</text:span></text:p>
          <text:list>
            <text:list-item>
              <text:p text:style-name="P208"><text:span text:style-name="T2">Tipo:</text:span> Numerico (spesso in una scala da 1 a 100).</text:p>
            </text:list-item>
            <text:list-item>
              <text:p text:style-name="P208"><text:span text:style-name="T2">Descrizione:</text:span> Un punteggio assegnato al cliente in base al suo comportamento e alla sua propensione alla spesa. Più è alto, più il cliente tende a spendere.</text:p>
            </text:list-item>
          </text:list>
        </text:list-item>
        <text:list-item>
          <text:p text:style-name="P207"><text:span text:style-name="Source_20_Text"><text:span text:style-name="T10">membership_years</text:span></text:span><text:span text:style-name="T11"> (Anni di iscrizione)</text:span></text:p>
          <text:list>
            <text:list-item>
              <text:p text:style-name="P208"><text:span text:style-name="T2">Tipo:</text:span> Numerico (<text:span text:style-name="T25">intero</text:span>).</text:p>
            </text:list-item>
            <text:list-item>
              <text:p text:style-name="P208"><text:soft-page-break/><text:span text:style-name="T2">Descrizione:</text:span> Indica da quanti anni il cliente è iscritto al programma fedeltà o è registrato sul sito/servizio. </text:p>
            </text:list-item>
          </text:list>
        </text:list-item>
        <text:list-item>
          <text:p text:style-name="P207"><text:span text:style-name="Source_20_Text"><text:span text:style-name="T10">purchase_frequency</text:span></text:span><text:span text:style-name="T11"> (Frequenza di acquisto)</text:span></text:p>
          <text:list>
            <text:list-item>
              <text:p text:style-name="P208"><text:span text:style-name="T2">Tipo:</text:span> Numerico discreto </text:p>
            </text:list-item>
            <text:list-item>
              <text:p text:style-name="P208"><text:span text:style-name="T2">Descrizione:</text:span> Indica quante volte il cliente effettua un acquisto in un <text:span text:style-name="T25">anno</text:span> . </text:p>
            </text:list-item>
          </text:list>
        </text:list-item>
        <text:list-item>
          <text:p text:style-name="P207"><text:span text:style-name="Source_20_Text"><text:span text:style-name="T10">preferred_category</text:span></text:span><text:span text:style-name="T11"> (Categoria preferita)</text:span></text:p>
          <text:list>
            <text:list-item>
              <text:p text:style-name="P208"><text:span text:style-name="T2">Tipo:</text:span> Categorico (es. Elettronica, Abbigliamento, Libri).</text:p>
            </text:list-item>
            <text:list-item>
              <text:p text:style-name="P208"><text:span text:style-name="T2">Descrizione:</text:span> La categoria merceologica in cui il cliente effettua la maggior parte dei suoi acquisti.</text:p>
            </text:list-item>
          </text:list>
        </text:list-item>
        <text:list-item>
          <text:p text:style-name="P207"><text:span text:style-name="Source_20_Text"><text:span text:style-name="T10">last_purchase_amount</text:span></text:span><text:span text:style-name="T11"> (Importo dell'ultimo acquisto)</text:span></text:p>
          <text:list>
            <text:list-item>
              <text:p text:style-name="P208"><text:span text:style-name="T2">Tipo:</text:span> Numerico continuo.</text:p>
            </text:list-item>
            <text:list-item>
              <text:p text:style-name="P208"><text:span text:style-name="T2">Descrizione:</text:span> La cifra esatta spesa dal cliente durante la sua ultima transazione. </text:p>
            </text:list-item>
          </text:list>
        </text:list-item>
      </text:list>
      <text:p text:style-name="P35"/>
      <text:p text:style-name="P38">- Dataset <text:span text:style-name="T18">degli ordini che riporta:</text:span></text:p>
      <text:p text:style-name="P33"/>
      <text:p text:style-name="P34"><text:span text:style-name="Source_20_Text"><text:span text:style-name="T10">mese</text:span></text:span></text:p>
      <text:list xml:id="list2518536357" text:style-name="L4">
        <text:list-item>
          <text:p text:style-name="P209"><text:span text:style-name="T2">Tipo:</text:span> Categorico .</text:p>
        </text:list-item>
        <text:list-item>
          <text:p text:style-name="P209"><text:span text:style-name="T2">Descrizione:</text:span> Indica il mese in cui è avvenuta la vendita o la rilevazione del dato.</text:p>
        </text:list-item>
      </text:list>
      <text:p text:style-name="P62"><text:span text:style-name="Source_20_Text"><text:span text:style-name="T10">daysinstock</text:span></text:span><text:span text:style-name="T11"> (Giorni in magazzino)</text:span></text:p>
      <text:list xml:id="list3886734392" text:style-name="L5">
        <text:list-item>
          <text:p text:style-name="P210"><text:span text:style-name="T2">Tipo:</text:span> Numerico discreto</text:p>
        </text:list-item>
        <text:list-item>
          <text:p text:style-name="P210"><text:span text:style-name="T2">Descrizione:</text:span> Indica per quanti giorni quel prodotto è rimasto fermo in magazzino prima di essere venduto .</text:p>
        </text:list-item>
      </text:list>
      <text:p text:style-name="Text_20_body"><text:span text:style-name="Source_20_Text"><text:span text:style-name="T10">dim</text:span></text:span><text:span text:style-name="T11"> (Dimensioni)</text:span></text:p>
      <text:list xml:id="list125204892" text:style-name="L6">
        <text:list-item>
          <text:p text:style-name="P211"><text:span text:style-name="T2">Tipo:</text:span> Categorico ( <text:span text:style-name="T27">p</text:span>, <text:span text:style-name="T27">m</text:span>, <text:span text:style-name="T27">g)</text:span></text:p>
        </text:list-item>
        <text:list-item>
          <text:p text:style-name="P211"><text:span text:style-name="T2">Descrizione:</text:span> Le dimensioni fisiche o l'ingombro del prodotto. Influisce direttamente sui costi di stoccaggio e spedizione.</text:p>
        </text:list-item>
      </text:list>
      <text:p text:style-name="Text_20_body"><text:span text:style-name="Source_20_Text"><text:span text:style-name="T10">packCost</text:span></text:span><text:span text:style-name="T11"> (Costo di imballaggio)</text:span></text:p>
      <text:list xml:id="list3239080668" text:style-name="L7">
        <text:list-item>
          <text:p text:style-name="P212"><text:span text:style-name="T2">Tipo:</text:span> Numerico continuo.</text:p>
        </text:list-item>
        <text:list-item>
          <text:p text:style-name="P212"><text:span text:style-name="T2">Descrizione:</text:span> Il costo sostenuto per confezionare e imballare l'oggetto per la spedizione </text:p>
        </text:list-item>
      </text:list>
      <text:p text:style-name="Text_20_body"><text:span text:style-name="Source_20_Text"><text:span text:style-name="T10">shippCost</text:span></text:span><text:span text:style-name="T11"> (Costo di spedizione)</text:span></text:p>
      <text:list xml:id="list676384914" text:style-name="L8">
        <text:list-item>
          <text:p text:style-name="P213"><text:span text:style-name="T2">Tipo:</text:span> Numerico continuo.</text:p>
        </text:list-item>
        <text:list-item>
          <text:p text:style-name="P213"><text:span text:style-name="T2">Descrizione:</text:span> La tariffa pagata al corriere per trasportare il prodotto dal magazzino al cliente finale.</text:p>
        </text:list-item>
      </text:list>
      <text:p text:style-name="Text_20_body"><text:span text:style-name="Source_20_Text"><text:span text:style-name="T10">shipptime</text:span></text:span><text:span text:style-name="T11"> (Tempo di spedizione)</text:span></text:p>
      <text:list xml:id="list1162088919" text:style-name="L9">
        <text:list-item>
          <text:p text:style-name="P214"><text:span text:style-name="T2">Tipo:</text:span> Numerico </text:p>
        </text:list-item>
        <text:list-item>
          <text:p text:style-name="P214"><text:span text:style-name="T2">Descrizione:</text:span> Il tempo effettivo impiegato dal corriere per consegnare il pacco a destinazione.</text:p>
        </text:list-item>
      </text:list>
      <text:p text:style-name="Text_20_body"><text:span text:style-name="Source_20_Text"><text:span text:style-name="T10">unitsSold</text:span></text:span><text:span text:style-name="T11"> (Unità vendute)</text:span></text:p>
      <text:list xml:id="list244932094" text:style-name="L10">
        <text:list-item>
          <text:p text:style-name="P215"><text:soft-page-break/><text:span text:style-name="T2">Tipo:</text:span> Numerico discreto.</text:p>
        </text:list-item>
        <text:list-item>
          <text:p text:style-name="P215"><text:span text:style-name="T2">Descrizione:</text:span> La quantità di pezzi venduti di quel determinato prodotto <text:span text:style-name="T26">nel mese</text:span>. </text:p>
        </text:list-item>
      </text:list>
      <text:p text:style-name="Text_20_body"><text:span text:style-name="Source_20_Text"><text:span text:style-name="T10">unitPrice</text:span></text:span><text:span text:style-name="T11"> (Prezzo unitario)</text:span></text:p>
      <text:list xml:id="list82377216" text:style-name="L11">
        <text:list-item>
          <text:p text:style-name="P216"><text:span text:style-name="T2">Tipo:</text:span> Numerico continuo.</text:p>
        </text:list-item>
        <text:list-item>
          <text:p text:style-name="P216"><text:span text:style-name="T2">Descrizione:</text:span> Il prezzo di vendita al pubblico del singolo prodotto.</text:p>
        </text:list-item>
      </text:list>
      <text:p text:style-name="Text_20_body"><text:span text:style-name="Source_20_Text"><text:span text:style-name="T10">rating</text:span></text:span><text:span text:style-name="T11"> (Valutazione/Recensione)</text:span></text:p>
      <text:list xml:id="list133918530" text:style-name="L12">
        <text:list-item>
          <text:p text:style-name="P217"><text:span text:style-name="T2">Tipo:</text:span> Numerico discreto (es. da 1 a 5 stelle).</text:p>
        </text:list-item>
        <text:list-item>
          <text:p text:style-name="P217"><text:span text:style-name="T2">Descrizione:</text:span> il voto lasciato dai clienti per quel prodotto. </text:p>
        </text:list-item>
      </text:list>
      <text:p text:style-name="Text_20_body"><text:span text:style-name="Source_20_Text"><text:span text:style-name="T10">città</text:span></text:span></text:p>
      <text:list xml:id="list1112095310" text:style-name="L13">
        <text:list-item>
          <text:p text:style-name="P218"><text:span text:style-name="T2">Tipo:</text:span> Categorico.</text:p>
        </text:list-item>
        <text:list-item>
          <text:p text:style-name="P218"><text:span text:style-name="T2">Descrizione:</text:span> La località geografica di destinazione della merce .</text:p>
        </text:list-item>
      </text:list>
      <text:p text:style-name="Text_20_body"><text:span text:style-name="Source_20_Text"><text:span text:style-name="T10">packType</text:span></text:span><text:span text:style-name="T11"> (Tipo di imballaggio)</text:span></text:p>
      <text:list xml:id="list685954701" text:style-name="L14">
        <text:list-item>
          <text:p text:style-name="P219"><text:span text:style-name="T2">Tipo:</text:span> Categorico </text:p>
        </text:list-item>
        <text:list-item>
          <text:p text:style-name="P219"><text:span text:style-name="T2">Descrizione:</text:span> La tipologia di confezionamento utilizzata per la spedizione</text:p>
        </text:list-item>
      </text:list>
      <text:p text:style-name="P36"/>
      <text:p text:style-name="P35"/>
      <text:p text:style-name="P205"><text:span text:style-name="T17"><text:s/></text:span></text:p>
      <text:p text:style-name="P31"><text:span text:style-name="Heading_20_1_20_Char"/></text:p>
      <text:p text:style-name="P10"><text:span text:style-name="Heading_20_1_20_Char">Sommario</text:span></text:p>
      <text:p text:style-name="P79">Per la realizzazione delle K<text:span text:style-name="T17">B</text:span>s sono stat<text:span text:style-name="T23">i</text:span> utilizzati i seguenti argomenti:</text:p>
      <text:p text:style-name="P79"/>
      <text:list xml:id="list371377297" text:style-name="L15">
        <text:list-item>
          <text:p text:style-name="P80">E’ stato utilizzato l’algoritmo astar per la ricerca del percorso più breve per una consegna.<text:span text:style-name="T24">(Paragrafo </text:span><text:span text:style-name="T130">3</text:span><text:span text:style-name="T24">)</text:span></text:p>
          <text:p text:style-name="P80"/>
        </text:list-item>
      </text:list>
      <text:list xml:id="list2367609601" text:style-name="L16">
        <text:list-item>
          <text:p text:style-name="P81">E’ stato utilizzato <text:span text:style-name="T17">una consistency-based diagnosis basata su clausole di Horn </text:span><text:span text:style-name="T22">implementata in prolog</text:span><text:span text:style-name="T17"> per la d</text:span><text:span text:style-name="T15">iagnostica guasti al sistema meccanico per elaborazione pacchi.</text:span></text:p>
          <text:p text:style-name="P82">(Paragrafo <text:span text:style-name="T130">4</text:span>)</text:p>
          <text:p text:style-name="P81"/>
        </text:list-item>
      </text:list>
      <text:list xml:id="list2254572729" text:style-name="L17">
        <text:list-item>
          <text:p text:style-name="P77">E’ stato utilizzato l’argoritmo di clustering k-means per il labeling ottimale del datasets clienti originariamente privo di labels e successivamente sono stati addestrati <text:span text:style-name="T20">sul dataset quindi etichettato</text:span> un knn,<text:span text:style-name="T19">un </text:span>RandomForest e <text:span text:style-name="T19">infine</text:span> <text:span text:style-name="T19">un regressore multinomiale. </text:span><text:span text:style-name="T20">Q</text:span><text:span text:style-name="T21">u</text:span><text:span text:style-name="T20">est’ultimo</text:span><text:span text:style-name="T19"> tramite stacking usando come modelli base il knn e </text:span><text:span text:style-name="T129">un nuovo</text:span><text:span text:style-name="T19"> RandomForest.E’ stato infine scelto tramite una analisi comparativa il migliore.</text:span><text:span text:style-name="T24">(Paragrafo 1.</text:span><text:span text:style-name="T116">1 e 1.2</text:span><text:span text:style-name="T24"> )</text:span></text:p>
          <text:p text:style-name="P78"/>
        </text:list-item>
        <text:list-item>
          <text:p text:style-name="P83"><text:soft-page-break/>E’ stata utilizzata <text:span text:style-name="T16">per la predizione delle caratteristiche più probabili per un ordine </text:span>una Rete Bayesiana la cui struttura è stata definita esplicitamente(Non imparata) e le cui CPDs sono state apprese dal dataset ordini .<text:span text:style-name="T24">(Paragrafo 2 )</text:span></text:p>
        </text:list-item>
      </text:list>
      <text:p text:style-name="P10"><text:span text:style-name="Heading_20_1_20_Char"><text:span text:style-name="T111"/></text:span></text:p>
      <text:p text:style-name="P10"><text:span text:style-name="Heading_20_1_20_Char"/></text:p>
      <text:p text:style-name="P10"><text:span text:style-name="Heading_20_1_20_Char"/></text:p>
      <text:p text:style-name="P10"><text:span text:style-name="Heading_20_1_20_Char"/></text:p>
      <text:p text:style-name="P10"><text:span text:style-name="Heading_20_1_20_Char"/></text:p>
      <text:p text:style-name="P10"><text:span text:style-name="Heading_20_1_20_Char">Elenco argomenti di interesse </text:span></text:p>
      <text:list xml:id="list3639592171" text:style-name="L18">
        <text:list-header>
          <text:p text:style-name="P189"><text:span text:style-name="Heading_20_1_20_Char"><text:span text:style-name="T114"/></text:span></text:p>
          <text:p text:style-name="P189"><text:span text:style-name="T114">1)</text:span><text:span text:style-name="T115">Apprendimento Non Supervisionato e Supervisionato:</text:span></text:p>
          <text:p text:style-name="P84"/>
        </text:list-header>
      </text:list>
      <text:list xml:id="list3294894211" text:style-name="L19">
        <text:list-item>
          <text:p text:style-name="P85"><text:span text:style-name="T3">Supervisionato </text:span><text:span text:style-name="T5">(1.2)</text:span><text:span text:style-name="T3">:</text:span> Knn, RandomForest, Stacking ensemble con modello finale regresso<text:span text:style-name="T38">r</text:span>e multinomiale e modelli base knn e RandomForest</text:p>
          <text:p text:style-name="P85"/>
        </text:list-item>
        <text:list-item>
          <text:p text:style-name="P85"><text:span text:style-name="T3">Non Supervisionato </text:span><text:span text:style-name="T5">(1.1)</text:span><text:span text:style-name="T3">: </text:span>Clustering k-means</text:p>
          <text:p text:style-name="P85"/>
        </text:list-item>
      </text:list>
      <text:list xml:id="list125922329257821" text:continue-list="list3639592171" text:style-name="L18">
        <text:list-header>
          <text:p text:style-name="P164"><text:span text:style-name="T120">2)</text:span>Apprendimento Probabilistico: <text:span text:style-name="T30">Belief Networks</text:span></text:p>
        </text:list-header>
      </text:list>
      <text:p text:style-name="P165"><text:span text:style-name="T30"/></text:p>
      <text:p text:style-name="P165"><text:span text:style-name="T30"/></text:p>
      <text:p text:style-name="P166"><text:span text:style-name="T30"><text:s text:c="10"/></text:span><text:span text:style-name="T120">3)</text:span><text:span text:style-name="T119">Ricerca in Spazi Di Stati :</text:span><text:span text:style-name="T28">Ricerca Informata: </text:span><text:span text:style-name="T30">A*</text:span></text:p>
      <text:list xml:id="list125922667785295" text:continue-numbering="true" text:style-name="L18">
        <text:list-header>
          <text:p text:style-name="P84"/>
          <text:p text:style-name="P167"><text:span text:style-name="T120">4)</text:span>Ragionamento Proposizionale:<text:span text:style-name="T29">Diagnosi basata su consistenza con clausole di Horn</text:span></text:p>
          <text:p text:style-name="P86"><text:span text:style-name="T30"/></text:p>
        </text:list-header>
      </text:list>
      <text:h text:style-name="P14" text:outline-level="1">Apprendimento Non Supervisionato <text:span text:style-name="T117">(1.1)</text:span></text:h>
      <text:p text:style-name="P7"/>
      <text:p text:style-name="P7"/>
      <text:h text:style-name="P6" text:outline-level="2">Sommario</text:h>
      <text:p text:style-name="P87">Il dataset clienti era inizialmente non etichettato quindi è stato utilizzato l’algoritmo non supervisionato di clustering k-means per <text:span text:style-name="T39">trovare il numero ottimale di clusters ovvero classi e restiuire il dataset etichettato.</text:span></text:p>
      <text:h text:style-name="P6" text:outline-level="2"/>
      <text:h text:style-name="P6" text:outline-level="2">Strumenti utilizzati</text:h>
      <text:p text:style-name="P88">E’ stato utilizzato il clustering k means. <text:span text:style-name="T110">[1]</text:span></text:p>
      <text:p text:style-name="P7"/>
      <text:h text:style-name="P6" text:outline-level="2">Decisioni di Progetto</text:h>
      <text:p text:style-name="P168">- Pre-processing:</text:p>
      <text:p text:style-name="P180"/>
      <text:p text:style-name="P168"><text:span text:style-name="T31">Essendo il k-means basato sulla distanza euclidea </text:span><text:span text:style-name="T32">è stato applicato in ordine:</text:span></text:p>
      <text:p text:style-name="P170"><text:span text:style-name="T32">1</text:span><text:span text:style-name="T29">)One-Hot encoding delle features categoriche</text:span></text:p>
      <text:p text:style-name="P168"><text:span text:style-name="T36">2</text:span><text:span text:style-name="T32">)U</text:span><text:span text:style-name="T31">no scaling MinMax in 0,1 per far si che ogni feature contribuisse in maniera egalitaria al calcolo della distanza appriscendere dal range del dominio.</text:span></text:p>
      <text:p text:style-name="P168"><text:span text:style-name="T36">3</text:span><text:span text:style-name="T32">)U</text:span><text:span text:style-name="T31">na Principal Component</text:span><text:span text:style-name="T32"> </text:span><text:span text:style-name="T31">Analisys(PCA) </text:span><text:span text:style-name="T37">[2]</text:span><text:span text:style-name="T31"> per ridurre la dimensionalit</text:span><text:span text:style-name="T33">à</text:span><text:span text:style-name="T31"> del problema poich</text:span><text:span text:style-name="T34">è</text:span><text:span text:style-name="T31"> per alte dimensionalit</text:span><text:span text:style-name="T35">à</text:span><text:span text:style-name="T31"> la distanza euclidea perde di utilità.</text:span></text:p>
      <text:p text:style-name="P168"><text:span text:style-name="T31"/></text:p>
      <text:p text:style-name="P169">- Scelta Iperparametri:</text:p>
      <text:p text:style-name="P169"/>
      <text:p text:style-name="P181">Scelta numero di componenti per la PCA.</text:p>
      <text:p text:style-name="P40"/>
      <text:p text:style-name="P40"><draw:frame draw:style-name="fr1" draw:name="Immagine1" text:anchor-type="char" svg:x="0.395cm" svg:y="0.173cm" svg:width="12.476cm" svg:height="9.357cm" draw:z-index="0"><draw:image xlink:href="Pictures/1000000100000280000001E0D0F3A67A6F314716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182">Per trovare il numero ottimale è stato calcolato per ogni percentuale di feature mantenute (10% 20% ecc) l’explained variance ratio . In seguito è stato trovato il ginocchio della curva.</text:p>
      <text:p text:style-name="P41"/>
      <text:p text:style-name="P40"><draw:frame draw:style-name="fr1" draw:name="Immagine2" text:anchor-type="char" svg:x="0.441cm" svg:y="0.049cm" svg:width="13.356cm" svg:height="1.249cm" draw:z-index="1"><draw:image xlink:href="Pictures/100000000000028C0000003D806D3740E22F7C07.png" xlink:type="simple" xlink:show="embed" xlink:actuate="onLoad" draw:mime-type="image/png"/></draw:frame></text:p>
      <text:p text:style-name="P40"/>
      <text:p text:style-name="P40"/>
      <text:p text:style-name="P181"/>
      <text:p text:style-name="P182">Il numero ottimale è il 40% delle features iniziali ovvero 6 feature, avendo un explained variance ratio di circa il 75%.</text:p>
      <text:p text:style-name="P181"/>
      <text:p text:style-name="P181">Scelta numero di cluster per il K-means.</text:p>
      <text:p text:style-name="P40"><draw:frame draw:style-name="fr1" draw:name="Immagine3" text:anchor-type="char" svg:x="-0.134cm" svg:y="0.333cm" svg:width="14.078cm" svg:height="10.559cm" draw:z-index="2"><draw:image xlink:href="Pictures/1000000100000280000001E0561A464CC5F309BB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1"/>
      <text:p text:style-name="P183">Per trovare il numero ottimale di clusters è stato calcolato per ogni numero di cluster l’inertia ed è stato poi calcolato il gomito della curva.</text:p>
      <text:p text:style-name="P42"/>
      <text:p text:style-name="P43"/>
      <text:p text:style-name="P43"><draw:frame draw:style-name="fr1" draw:name="Immagine4" text:anchor-type="char" svg:x="0.931cm" svg:y="0.088cm" svg:width="10.573cm" svg:height="7.929cm" draw:z-index="3"><draw:image xlink:href="Pictures/1000000100000280000001E080227CCB0B91DB97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84">Il numero ottimale di cluster trovato è 12.</text:p>
      <text:p text:style-name="P184"/>
      <text:p text:style-name="P169">- Librerie:</text:p>
      <text:p text:style-name="P171"/>
      <text:p text:style-name="P171">Sklearn : <text:span text:style-name="T29">PCA,MinMaxScaler,Kmeans</text:span></text:p>
      <text:p text:style-name="P172">Kneed : <text:span text:style-name="T29">KneeLocator</text:span></text:p>
      <text:p text:style-name="P89"/>
      <text:p text:style-name="P7"/>
      <text:p text:style-name="P7"/>
      <text:p text:style-name="P44"/>
      <text:h text:style-name="P6" text:outline-level="2">Valutazione</text:h>
      <text:p text:style-name="P29"><text:span text:style-name="Heading_20_1_20_Char"/></text:p>
      <text:p text:style-name="P29"><text:span text:style-name="Heading_20_1_20_Char"><text:span text:style-name="T40">Per la valutazione della bontà del clustering è stato impiegato il silouhette score.</text:span></text:span></text:p>
      <text:p text:style-name="P29"><text:span text:style-name="Heading_20_1_20_Char"><text:span text:style-name="T40"/></text:span></text:p>
      <text:p text:style-name="P29"><text:span text:style-name="Heading_20_1_20_Char"><text:span text:style-name="T40"/></text:span></text:p>
      <text:p text:style-name="P29"><text:span text:style-name="Heading_20_1_20_Char"><text:span text:style-name="T40">Uno score di 0.95 indica una quasi perfetta coesione e separazione tra i clusters.</text:span></text:span></text:p>
      <text:p text:style-name="P29"><draw:frame draw:style-name="fr1" draw:name="Immagine5" text:anchor-type="char" svg:x="0.372cm" svg:y="1.388cm" svg:width="12.816cm" svg:height="0.612cm" draw:z-index="4"><draw:image xlink:href="Pictures/1000000000000178000000123E805C7F41BF3B60.png" xlink:type="simple" xlink:show="embed" xlink:actuate="onLoad" draw:mime-type="image/png"/></draw:frame><text:span text:style-name="Heading_20_1_20_Char"><text:span text:style-name="T40"/></text:span></text:p>
      <text:h text:style-name="P15" text:outline-level="1">Apprendimento Supervisionato <text:span text:style-name="T118">(1.2)</text:span></text:h>
      <text:p text:style-name="P21"/>
      <text:h text:style-name="P20" text:outline-level="2">Sommario</text:h>
      <text:p text:style-name="P90">E’ stato <text:span text:style-name="T49">usato</text:span> il dataset clienti etichettato per addestrare un knn , un Random Forest e un regressore Multinomiale. Quest’ultimo utilizzando lo stacking usando come modelli base il knn e <text:span text:style-name="T46">un nuovo </text:span>Random Forest <text:span text:style-name="T50">che chiameremo RandomForeststacking</text:span>. E’ stata fatta una analisi comparativa e scelto il migliore.</text:p>
      <text:h text:style-name="P67" text:outline-level="2"/>
      <text:h text:style-name="P20" text:outline-level="2">Strumenti utilizzati</text:h>
      <text:p text:style-name="P11"/>
      <text:p text:style-name="P91">Sono stati utilizzati i seguenti modelli:</text:p>
      <text:p text:style-name="P92"><text:span text:style-name="T44">-K-nearest </text:span>neighbour <text:span text:style-name="T103">[3]</text:span></text:p>
      <text:p text:style-name="P95">-Random Forest <text:span text:style-name="T103">[4]</text:span></text:p>
      <text:p text:style-name="P95">-Multinomial Regressor <text:span text:style-name="T103">[5]</text:span></text:p>
      <text:p text:style-name="P96"/>
      <text:h text:style-name="P20" text:outline-level="2">Decisioni di Progetto</text:h>
      <text:p text:style-name="P21"/>
      <text:p text:style-name="P97">E’ stato effettuat<text:span text:style-name="T51">o</text:span> un<text:span text:style-name="T60"> val</text:span><text:span text:style-name="T61">idation </text:span><text:span text:style-name="T60">- traintest (50%-50%) </text:span>split stratificato. <text:span text:style-name="T61">Il validation usato per la ricerca degli iperparametri e il traintest per allenare e testare il modello </text:span><text:span text:style-name="T62">usando cross validation </text:span><text:span text:style-name="T63">stratificata</text:span><text:span text:style-name="T62"> per poter ottenere performance medie.</text:span></text:p>
      <text:p text:style-name="P97"/>
      <text:p text:style-name="P173">-<text:span text:style-name="T45">Preprocessing</text:span></text:p>
      <text:p text:style-name="P96"/>
      <text:p text:style-name="P98"><text:span text:style-name="T128">RandomForest :</text:span> <text:span text:style-name="T47">Non è stato fatto alcun tipo di preprocessing</text:span></text:p>
      <text:p text:style-name="P100"/>
      <text:p text:style-name="P185">Knn <text:span text:style-name="T65">e</text:span> <text:span text:style-name="T48">RandomForest</text:span><text:span text:style-name="T50">stacking</text:span> :</text:p>
      <text:p text:style-name="P101"/>
      <text:p text:style-name="P102"/>
      <text:p text:style-name="P104">1)onehot encoding feature categoriche <text:s/></text:p>
      <text:p text:style-name="P104">2)MinMax scaling in 0,1</text:p>
      <text:p text:style-name="P104">3) <text:span text:style-name="T32">U</text:span><text:span text:style-name="T31">na Principal Component</text:span><text:span text:style-name="T32"> </text:span><text:span text:style-name="T31">Analisys(PCA) per ridurre la dimensionalit</text:span><text:span text:style-name="T33">à</text:span><text:span text:style-name="T31"> del problema</text:span></text:p>
      <text:p text:style-name="P98"/>
      <text:p text:style-name="P103">poiché utili al knn <text:span text:style-name="T53">dato che</text:span><text:span text:style-name="T52"> anche questo </text:span><text:span text:style-name="T54">è</text:span><text:span text:style-name="T52"> basato sulla distanza euclidea.</text:span></text:p>
      <text:p text:style-name="P98"/>
      <text:p text:style-name="P98"/>
      <text:p text:style-name="P98"/>
      <text:p text:style-name="P186"><text:soft-page-break/>Multinomial regressor</text:p>
      <text:p text:style-name="P105"/>
      <text:p text:style-name="P106">E’ stato addestrato su un dataset creato unendo le predizioni del knn e del RandomForeststacking, sul dataset preprocessato . Quindi al regressor si applica lo stesso tipo di preprocessing .<text:span text:style-name="T59">Molto utile per il regressor</text:span><text:span text:style-name="T66">e</text:span><text:span text:style-name="T59"> </text:span><text:span text:style-name="T66">è </text:span><text:span text:style-name="T58">lo <text:s/>scaling per rendere ogni feature a priori egalitaria nell’apprendimento.</text:span></text:p>
      <text:p text:style-name="P100"/>
      <text:p text:style-name="P100"/>
      <text:p text:style-name="P173">-<text:span text:style-name="T45">Scelta iperparametri</text:span></text:p>
      <text:p text:style-name="P173"/>
      <text:p text:style-name="P107"><text:span text:style-name="T56">Per tutti i modelli </text:span><text:span text:style-name="T57"><text:s/></text:span><text:span text:style-name="T56">è</text:span> stata usat<text:span text:style-name="T55">a</text:span> una Randomized Grid Search con cross validation <text:span text:style-name="T64">stratificata </text:span>con 10 split e 600 iterazioni come condizione di terminazione dell<text:span text:style-name="T131">a</text:span> ricerca.</text:p>
      <text:p text:style-name="P45"/>
      <text:p text:style-name="P174">RandomForest</text:p>
      <text:p text:style-name="P99"/>
      <text:p text:style-name="P108">Grid Paramentri:</text:p>
      <text:p text:style-name="P46"/>
      <text:p text:style-name="P46"><draw:frame draw:style-name="fr1" draw:name="Immagine10" text:anchor-type="char" svg:x="0cm" svg:y="0.295cm" svg:width="17cm" svg:height="4.576cm" draw:z-index="9"><draw:image xlink:href="Pictures/100000000000034F000000E4566F3D6E4DD0FF54.png" xlink:type="simple" xlink:show="embed" xlink:actuate="onLoad" draw:mime-type="image/png"/></draw:frame></text:p>
      <text:p text:style-name="P46"/>
      <text:p text:style-name="P46"/>
      <text:p text:style-name="P46"/>
      <text:p text:style-name="P108">Migliori Parametri:</text:p>
      <text:p text:style-name="P46"/>
      <text:p text:style-name="P46"><draw:frame draw:style-name="fr1" draw:name="Immagine11" text:anchor-type="char" svg:x="-1.171cm" svg:y="0.455cm" svg:width="19.627cm" svg:height="2.866cm" draw:z-index="10"><draw:image xlink:href="Pictures/10000000000005640000008E150C1A09B056C1C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108"/>
      <text:p text:style-name="P174">Knn</text:p>
      <text:p text:style-name="P99"/>
      <text:p text:style-name="P99"/>
      <text:p text:style-name="P99"/>
      <text:p text:style-name="P108">Grid Paramentri:</text:p>
      <text:p text:style-name="P46"/>
      <text:p text:style-name="P46"/>
      <text:p text:style-name="P46"><draw:frame draw:style-name="fr1" draw:name="Immagine6" text:anchor-type="char" svg:x="0.046cm" svg:y="0.466cm" svg:width="11.984cm" svg:height="4.814cm" draw:z-index="5"><draw:image xlink:href="Pictures/1000000000000249000000EB9CDF5599C2242402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08">Migliori Parametri:</text:p>
      <text:p text:style-name="P46"/>
      <text:p text:style-name="P46"><draw:frame draw:style-name="fr4" draw:name="Immagine9" text:anchor-type="char" svg:width="17cm" svg:height="3.083cm" draw:z-index="8"><draw:image xlink:href="Pictures/10000000000003A4000000A998C19C1EFEB86EE2.png" xlink:type="simple" xlink:show="embed" xlink:actuate="onLoad" draw:mime-type="image/png"/></draw:frame></text:p>
      <text:p text:style-name="P46"/>
      <text:p text:style-name="P108"/>
      <text:p text:style-name="P109">weights= distance , <text:span text:style-name="T70">pesa i vicini in modo inversamente proporzioanle alla distanza dal punto in esame per la predizione della classe</text:span></text:p>
      <text:p text:style-name="P109">p=1 <text:span text:style-name="T71">distanza di manhattan </text:span></text:p>
      <text:p text:style-name="P109">leaf_size e kd tree = <text:span text:style-name="T68">il kd tree </text:span><text:span text:style-name="T104">[</text:span><text:span text:style-name="T105">6</text:span><text:span text:style-name="T104">] </text:span><text:span text:style-name="T68">è un algoritmo che partiziona lo spazio di ricerca dei vicini utilizzando un decision tree e successivamente utilizza il backtracking con la distanza come metrica di valutazione per trovare il piu vicino. Questo è molto efficiente con complessit</text:span><text:span text:style-name="T69">à</text:span><text:span text:style-name="T68"> logN</text:span></text:p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175">RandomForeststacking</text:p>
      <text:p text:style-name="P110"/>
      <text:p text:style-name="P110"/>
      <text:p text:style-name="P108">Grid Paramentri:</text:p>
      <text:p text:style-name="P108"/>
      <text:p text:style-name="P46"><draw:frame draw:style-name="fr1" draw:name="Immagine12" text:anchor-type="char" svg:x="0.021cm" svg:y="0.25cm" svg:width="17cm" svg:height="4.576cm" draw:z-index="11"><draw:image xlink:href="Pictures/100000000000034F000000E4566F3D6E4DD0FF54.png" xlink:type="simple" xlink:show="embed" xlink:actuate="onLoad" draw:mime-type="image/png"/></draw:frame></text:p>
      <text:p text:style-name="P46"/>
      <text:p text:style-name="P46"/>
      <text:p text:style-name="P46"/>
      <text:p text:style-name="P108">Migliori Parametri:</text:p>
      <text:p text:style-name="P46"/>
      <text:p text:style-name="P46"><draw:frame draw:style-name="fr1" draw:name="Immagine13" text:anchor-type="char" svg:x="-1.547cm" svg:y="0.131cm" svg:width="19.902cm" svg:height="2.641cm" draw:z-index="12"><draw:image xlink:href="Pictures/100000000000055F0000008A189DA38B994BCB38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08"/>
      <text:p text:style-name="P174">Multinomial Regressor</text:p>
      <text:p text:style-name="P99"/>
      <text:p text:style-name="P108">Grid Paramentri:</text:p>
      <text:p text:style-name="P108"/>
      <text:p text:style-name="P46"><draw:frame draw:style-name="fr1" draw:name="Immagine7" text:anchor-type="char" svg:x="-0.115cm" svg:y="0.441cm" svg:width="17cm" svg:height="3.545cm" draw:z-index="6"><draw:image xlink:href="Pictures/100000000000034C000000B0E4F93E5E9A55327D.png" xlink:type="simple" xlink:show="embed" xlink:actuate="onLoad" draw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108">Migliori Parametri:</text:p>
      <text:p text:style-name="P46"><draw:frame draw:style-name="fr1" draw:name="Immagine8" text:anchor-type="char" svg:x="0.097cm" svg:y="0.353cm" svg:width="15.24cm" svg:height="3.154cm" draw:z-index="7"><draw:image xlink:href="Pictures/10000000000002E80000009A4ABA367F041A3B03.png" xlink:type="simple" xlink:show="embed" xlink:actuate="onLoad" draw:mime-type="image/png"/></draw:frame></text:p>
      <text:p text:style-name="P46"/>
      <text:p text:style-name="P46"/>
      <text:p text:style-name="P108"/>
      <text:p text:style-name="P111">l1 ratio = regolarizzazione l2</text:p>
      <text:p text:style-name="P111">solver = newton-cg <text:span text:style-name="T106">[7]</text:span> <text:span text:style-name="T67">è un solver che non usa solo il gradiente per minimizzare la loss ma anche la curvatura della loss utilizzando la derivata di secondo grado per capire la convessità, concavita della loss </text:span></text:p>
      <text:p text:style-name="P111">C = 1 <text:s/>è la costante di regolarizzazione per cui è moltiplicata la penalità l2</text:p>
      <text:p text:style-name="P111"/>
      <text:p text:style-name="P111">E’ stato utilizzata la Cross Entropy Loss come loss function</text:p>
      <text:p text:style-name="P108"/>
      <text:p text:style-name="P46"/>
      <text:h text:style-name="P20" text:outline-level="2">Valutazione</text:h>
      <text:p text:style-name="P21"/>
      <text:p text:style-name="P112">Per ogni modello si riporta : </text:p>
      <text:p text:style-name="P112"/>
      <text:list xml:id="list1542504985" text:style-name="L21">
        <text:list-item>
          <text:p text:style-name="P113"><text:span text:style-name="T3">Learning curve</text:span> <text:span text:style-name="T73">calcolata usando per ogni dataset size l’accuracy media usando cross validation con 10 split</text:span></text:p>
          <text:p text:style-name="P113"/>
        </text:list-item>
        <text:list-item>
          <text:p text:style-name="P113"><text:span text:style-name="T3">Metriche medie</text:span> <text:span text:style-name="T75">usando</text:span> <text:span text:style-name="T75">cross validation con 10 split</text:span></text:p>
          <text:p text:style-name="P113"/>
        </text:list-item>
        <text:list-item>
          <text:p text:style-name="P113"><text:span text:style-name="T6">T</text:span><text:span text:style-name="T3">abell</text:span><text:span text:style-name="T7">a</text:span><text:span text:style-name="T3"> dei punteggi</text:span> per ognuno d<text:span text:style-name="T74">ei</text:span> 10 split <text:span text:style-name="T74">della cross validation</text:span> riportando anche <text:span text:style-name="T72">media ,</text:span>var e std.</text:p>
        </text:list-item>
      </text:list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6">RandomForest</text:p>
      <text:p text:style-name="P114"/>
      <text:p text:style-name="P114"/>
      <text:p text:style-name="P114">Learning curve:</text:p>
      <text:p text:style-name="P47"/>
      <text:p text:style-name="P47"/>
      <text:p text:style-name="P47"/>
      <text:p text:style-name="P47"/>
      <text:p text:style-name="P47"/>
      <text:p text:style-name="P47"><draw:frame draw:style-name="fr1" draw:name="Immagine14" text:anchor-type="char" svg:x="-1.452cm" svg:y="0.415cm" svg:width="19.438cm" svg:height="9.589cm" draw:z-index="13"><draw:image xlink:href="Pictures/10000001000005CE000002DDB77D6559284DF794.png" xlink:type="simple" xlink:show="embed" xlink:actuate="onLoad" draw:mime-type="image/png"/></draw:frame></text:p>
      <text:p text:style-name="P47"/>
      <text:p text:style-name="P117">la training loss è con pochi dati molto bassa e la test loss all’aumentare dei dati scende con costanza.</text:p>
      <text:p text:style-name="P119"><text:soft-page-break/>Le curve per la loss su train e test scendono entrambe stabilizzandosi verso lo 0 all’aumentare dei dati quindi il modello non soffre di alto bias o alta varianza 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Metriche:</text:p>
      <text:p text:style-name="P114"/>
      <text:p text:style-name="P114"/>
      <text:p text:style-name="P114"/>
      <text:p text:style-name="P122">Le metriche utilizzate :Accuracy,Precision,Recall,F1 mostrano un massimo discernimento delle classi con valori massimi sia di precision che di recall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magine15" text:anchor-type="char" svg:x="-0.058cm" svg:y="0.108cm" svg:width="12.046cm" svg:height="9.035cm" draw:z-index="14"><draw:image xlink:href="Pictures/1000000100000280000001E016611AF89CDFAD77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114"/>
      <text:p text:style-name="P114">Tabella performance:</text:p>
      <text:p text:style-name="P47"><draw:frame draw:style-name="fr1" draw:name="Immagine16" text:anchor-type="char" svg:x="-1.321cm" svg:y="0.497cm" svg:width="19.867cm" svg:height="14.563cm" draw:z-index="15"><draw:image xlink:href="Pictures/10000001000003E8000002DDF1F2297A5CCD12B9.png" xlink:type="simple" xlink:show="embed" xlink:actuate="onLoad" draw:mime-type="image/png"/></draw:frame></text:p>
      <text:p text:style-name="P47"/>
      <text:p text:style-name="P47"/>
      <text:p text:style-name="P126">Per ogni split il modello riporta una accuracy del 100% e di conseguenza la media è del 100% e var e std 0. Questo indica un modello estremamente preciso e molto stabile nelle predizioni ovvero basso bias e bassa varianza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76">Knn</text:p>
      <text:p text:style-name="P114"/>
      <text:p text:style-name="P114"/>
      <text:p text:style-name="P114">Learning curve:</text:p>
      <text:p text:style-name="P47"/>
      <text:p text:style-name="P47"/>
      <text:p text:style-name="P47"/>
      <text:p text:style-name="P47"><draw:frame draw:style-name="fr1" draw:name="Immagine17" text:anchor-type="char" svg:x="-1.247cm" svg:y="0.228cm" svg:width="19.526cm" svg:height="9.631cm" draw:z-index="16"><draw:image xlink:href="Pictures/10000001000005CE000002DDB9E58EF11341EF8B.png" xlink:type="simple" xlink:show="embed" xlink:actuate="onLoad" draw:mime-type="image/png"/></draw:frame></text:p>
      <text:p text:style-name="P47"/>
      <text:p text:style-name="P130">L’errore su train e test scende in maniera an<text:span text:style-name="T132">a</text:span>loga all’aumentare dei dati.</text:p>
      <text:p text:style-name="P119">Le curve per la loss su train e test scendono entrambe stabilizzandosi verso lo 0 all’aumentare dei dati quindi il modello non soffre di alto bias o alta varianza </text:p>
      <text:p text:style-name="P114"/>
      <text:p text:style-name="P114"/>
      <text:p text:style-name="P114"/>
      <text:p text:style-name="P114">Metriche:</text:p>
      <text:p text:style-name="P114"/>
      <text:p text:style-name="P114"/>
      <text:p text:style-name="P114"/>
      <text:p text:style-name="P123">Le metriche utilizzate :Accuracy,Precision,Recall,F1 mostrano un massimo discernimento delle classi con valori massimi sia di precision che di recall</text:p>
      <text:p text:style-name="P48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><draw:frame draw:style-name="fr1" draw:name="Immagine18" text:anchor-type="char" svg:x="0.288cm" svg:y="0.231cm" svg:width="10.871cm" svg:height="8.154cm" draw:z-index="17"><draw:image xlink:href="Pictures/1000000100000280000001E0A023BE3B7761417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>Tabella performance:</text:p>
      <text:p text:style-name="P114"/>
      <text:p text:style-name="P47"><draw:frame draw:style-name="fr1" draw:name="Immagine19" text:anchor-type="char" svg:x="-1.219cm" svg:y="0.198cm" svg:width="19.574cm" svg:height="14.346cm" draw:z-index="18"><draw:image xlink:href="Pictures/10000001000003E8000002DD178F77B86B3881F0.png" xlink:type="simple" xlink:show="embed" xlink:actuate="onLoad" draw:mime-type="image/png"/></draw:frame><text:soft-page-break/></text:p>
      <text:p text:style-name="P47"/>
      <text:p text:style-name="P47"/>
      <text:p text:style-name="P114"/>
      <text:p text:style-name="P127">Per ogni split il modello riporta una accuracy del 100% e di conseguenza la media è del 100% e var e std 0. Questo indica un modello estremamente preciso e molto stabile nelle predizioni ovvero basso bias e bassa varianza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76"><text:soft-page-break/>RandomForeststacking</text:p>
      <text:p text:style-name="P114"/>
      <text:p text:style-name="P114">Learning curve:</text:p>
      <text:p text:style-name="P114"/>
      <text:p text:style-name="P47"/>
      <text:p text:style-name="P47"/>
      <text:p text:style-name="P47"/>
      <text:p text:style-name="P47"/>
      <text:p text:style-name="P47"><draw:frame draw:style-name="fr1" draw:name="Immagine20" text:anchor-type="char" svg:x="-1.623cm" svg:y="0cm" svg:width="19.749cm" svg:height="9.74cm" draw:z-index="19"><draw:image xlink:href="Pictures/10000001000005CE000002DD98E7E612995778DE.png" xlink:type="simple" xlink:show="embed" xlink:actuate="onLoad" draw:mime-type="image/png"/></draw:frame></text:p>
      <text:p text:style-name="P47"/>
      <text:p text:style-name="P47"/>
      <text:p text:style-name="P47"/>
      <text:p text:style-name="P118">la training loss è con pochi dati molto bassa e la test loss all’aumentare dei dati scende con costanza.</text:p>
      <text:p text:style-name="P120">Le curve per la loss su train e test scendono entrambe stabilizzandosi verso lo 0 all’aumentare dei dati quindi il modello non soffre di alto bias o alta varianza 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>Metriche:</text:p>
      <text:p text:style-name="P114"/>
      <text:p text:style-name="P114"/>
      <text:p text:style-name="P124">Le metriche utilizzate :Accuracy,Precision,Recall,F1 mostrano un massimo discernimento delle classi con valori massimi sia di precision che di recall</text:p>
      <text:p text:style-name="P11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magine21" text:anchor-type="char" svg:x="0.312cm" svg:y="0.111cm" svg:width="11.061cm" svg:height="8.296cm" draw:z-index="20"><draw:image xlink:href="Pictures/1000000100000280000001E047C7E523D32BB0FC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/>
      <text:p text:style-name="P114">Tabella performance:</text:p>
      <text:p text:style-name="P47"/>
      <text:p text:style-name="P47"/>
      <text:p text:style-name="P47"/>
      <text:p text:style-name="P47"><draw:frame draw:style-name="fr2" draw:name="Immagine22" text:anchor-type="char" svg:width="18.725cm" svg:height="12.982cm" draw:z-index="21"><draw:image xlink:href="Pictures/10000001000003E8000002DD48BBBB459ADAA53A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128">Per ogni split il modello riporta una accuracy del 100% e di conseguenza la media è del 100% e var e std 0. Questo indica un modello estremamente preciso e molto stabile nelle predizioni ovvero basso bias e bassa varianza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76">Multinomial Regressor</text:p>
      <text:p text:style-name="P114"/>
      <text:p text:style-name="P114"/>
      <text:p text:style-name="P114">Learning curve:</text:p>
      <text:p text:style-name="P47"/>
      <text:p text:style-name="P47"><draw:frame draw:style-name="fr1" draw:name="Immagine23" text:anchor-type="char" svg:x="-1.249cm" svg:y="0.938cm" svg:width="19.526cm" svg:height="9.631cm" draw:z-index="22"><draw:image xlink:href="Pictures/10000001000005CE000002DD3C0FED6DB51D8BDF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203"/>
      <text:p text:style-name="P47"/>
      <text:p text:style-name="P131"><text:span text:style-name="T76">L</text:span>’errore su train e test scende an<text:span text:style-name="T133">a</text:span>logamente tuttavia sono necessari più dati rispetto agli altri modelli per arrivare a una convergenza verso lo zero.</text:p>
      <text:p text:style-name="P121">Le curve per la loss su train e test scendono entrambe stabilizzandosi verso lo 0 all’aumentare dei dati quindi il modello non soffre di alto bias o alta varianza </text:p>
      <text:p text:style-name="P116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>Metriche:</text:p>
      <text:p text:style-name="P114"/>
      <text:p text:style-name="P114"/>
      <text:p text:style-name="P114"/>
      <text:p text:style-name="P125">Le metriche utilizzate :Accuracy,Precision,Recall,F1 mostrano un massimo discernimento delle classi con valori massimi sia di precision che di recall</text:p>
      <text:p text:style-name="P49"/>
      <text:p text:style-name="P49"/>
      <text:p text:style-name="P47"><draw:frame draw:style-name="fr1" draw:name="Immagine24" text:anchor-type="char" svg:x="0.023cm" svg:y="0.469cm" svg:width="10.786cm" svg:height="8.089cm" draw:z-index="23"><draw:image xlink:href="Pictures/1000000100000280000001E0A267B8195795698F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>Tabella performance:</text:p>
      <text:p text:style-name="P114"/>
      <text:p text:style-name="P47"/>
      <text:p text:style-name="P47"><draw:frame draw:style-name="fr2" draw:name="Immagine25" text:anchor-type="char" svg:width="18.676cm" svg:height="12.834cm" draw:z-index="24"><draw:image xlink:href="Pictures/10000001000003E8000002DD4ABFC00726D7D62F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129">Per ogni split il modello riporta una accuracy del 100% e di conseguenza la media è del 100% e var e std 0. Questo indica un modello estremamente preciso e molto stabile nelle predizioni ovvero basso bias e bassa varianza</text:p>
      <text:p text:style-name="P114"/>
      <text:p text:style-name="P114"/>
      <text:p text:style-name="P177">Librerie:Sklearn</text:p>
      <text:p text:style-name="P177"/>
      <text:p text:style-name="P3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2"><text:soft-page-break/>CONSIDERAZIONI GENERALI SUI RISULTATI <text:span text:style-name="T93">E ANALISI COMPARATIVA</text:span></text:p>
      <text:p text:style-name="P47"/>
      <text:p text:style-name="P132">Tutti i modelli hanno delle prestazioni perfette . Questo non è sintomatologia di data leakage ma è dovuto al fatto che i modelli supervisionati stanno apprendendo da un dataset etichettato tramite clustering con silouhette score di 0.95 . Quindi stanno apprendendo una suddivisione delle classi quasi perfetta .</text:p>
      <text:p text:style-name="P114"/>
      <text:p text:style-name="P162">ANALISI COMPARATIVA</text:p>
      <text:p text:style-name="P133">In questo caso ogni modello ha performance perfette per via della divisione a priori perfetta delle classi. Ogni modello è ugualmente valido , si è scelto di utilizzare il RandomForest solo perch<text:span text:style-name="T95">è</text:span> mantiene l’interpretabilità delle features.</text:p>
      <text:p text:style-name="P114"/>
      <text:p text:style-name="P134"/>
      <text:p text:style-name="P133">Esempio:</text:p>
      <text:p text:style-name="P58"/>
      <text:p text:style-name="P58"><draw:frame draw:style-name="fr1" draw:name="Immagine34" text:anchor-type="char" svg:x="-1.558cm" svg:y="0.333cm" svg:width="20.032cm" svg:height="8.862cm" draw:z-index="33"><draw:image xlink:href="Pictures/1000000000000424000001D5F63F63E0D23111F9.png" xlink:type="simple" xlink:show="embed" xlink:actuate="onLoad" draw:mime-type="image/png"/></draw:frame></text:p>
      <text:p text:style-name="P58"/>
      <text:p text:style-name="P58"/>
      <text:p text:style-name="P58"/>
      <text:p text:style-name="P135">La Affidabilità non è altro che la media su i decision tree della forest della frequenza<text:span text:style-name="T94">(es 88%)</text:span> della classe maggioritaria usata per la predizione.</text:p>
      <text:h text:style-name="P16" text:outline-level="1">Apprendimento Probabilistico:Belief Networks<text:span text:style-name="T118">(2)</text:span></text:h>
      <text:p text:style-name="P23"/>
      <text:p text:style-name="P23"/>
      <text:h text:style-name="P22" text:outline-level="2">Sommario</text:h>
      <text:p text:style-name="P136">E’ stato utilizzata una Rete Bayesiana definita esplicitamente e <text:s/>i cui parametri sono stati appresi utilizzando il dataset ordini. Viene usata per predire il valore più probabile per una feature dell’ordine date le restanti.</text:p>
      <text:h text:style-name="P22" text:outline-level="2"/>
      <text:h text:style-name="P22" text:outline-level="2">Strumenti utilizzati</text:h>
      <text:p text:style-name="P23"/>
      <text:p text:style-name="P137">Rete bayesiana.</text:p>
      <text:p text:style-name="P12"/>
      <text:h text:style-name="P22" text:outline-level="2">Decisioni di Progetto</text:h>
      <text:p text:style-name="P23"/>
      <text:p text:style-name="P23"/>
      <text:p text:style-name="P138"><text:s/><text:span text:style-name="T78">Rete bayesiana </text:span><text:span text:style-name="T79">c</text:span><text:span text:style-name="T78">ostruita per modellare l’ indipendenza condizionata tra caratteristiche ordine.</text:span></text:p>
      <text:p text:style-name="P23"/>
      <text:p text:style-name="P23"><draw:frame draw:style-name="fr1" draw:name="Immagine26" text:anchor-type="char" svg:x="1.413cm" svg:y="0.159cm" svg:width="10.631cm" svg:height="9.075cm" draw:z-index="25"><draw:image xlink:href="Pictures/1000000100000207000001BB9B17533A5688B54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139">E’ stata utilizzata:</text:p>
      <text:p text:style-name="P139"/>
      <text:p text:style-name="P139"/>
      <text:p text:style-name="P140">Maximum LikeliHood estimation per stima parametri <text:span text:style-name="T80">(CPDs)</text:span>. <text:span text:style-name="T107">[8]</text:span></text:p>
      <text:p text:style-name="P144">Questo poiché il dataset ordin<text:span text:style-name="T121">i</text:span> è molto grande e per la legge dei grandi numeri la MLE tende alla legge reale <text:span text:style-name="T122">con l’</text:span> aumentare dei dati</text:p>
      <text:p text:style-name="P140"/>
      <text:p text:style-name="P140"><text:span text:style-name="T77">Variable Elimination per inferenza valore probabile.</text:span> <text:span text:style-name="T107">[9]</text:span></text:p>
      <text:p text:style-name="P141"/>
      <text:p text:style-name="P141"><text:s/><text:span text:style-name="T123">Questo poiche è inferenza esatta e può sfruttare la struttura (fattorizzazione della rete) invece che campionare la distribuzione congiunta.</text:span></text:p>
      <text:p text:style-name="P142">Librerie : pgmpy</text:p>
      <text:p text:style-name="P17"/>
      <text:p text:style-name="P23"/>
      <text:p text:style-name="P23"/>
      <text:h text:style-name="P22" text:outline-level="2">Valutazione</text:h>
      <text:p text:style-name="P23"/>
      <text:p text:style-name="P143">Esempio di utilizzo.</text:p>
      <text:p text:style-name="P23"><draw:frame draw:style-name="fr1" draw:name="Immagine27" text:anchor-type="char" svg:x="0.487cm" svg:y="0.395cm" svg:width="12.208cm" svg:height="8.664cm" draw:z-index="26"><draw:image xlink:href="Pictures/1000000000000254000001A78837A9E6C19D2ECA.png" xlink:type="simple" xlink:show="embed" xlink:actuate="onLoad" draw:mime-type="image/png"/></draw:frame></text:p>
      <text:h text:style-name="P66" text:outline-level="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194"><text:span text:style-name="T112">Si è scelto di predire il numero di units sold date le altre feature , il valore più probabile è quindi circa 7 unità vendute</text:span></text:p>
      <text:h text:style-name="P5" text:outline-level="1"/>
      <text:p text:style-name="P7"/>
      <text:h text:style-name="P18" text:outline-level="1">Ricerca in spazi di stati:Ricerca Informata: A*<text:span text:style-name="T118">(3)</text:span></text:h>
      <text:p text:style-name="P25"/>
      <text:p text:style-name="P25"/>
      <text:h text:style-name="P24" text:outline-level="2">Sommario</text:h>
      <text:p text:style-name="P145">E’ stato utlizzato l’algoritmo astar per la ricerca del percorso più breve per una consegna. Il grafo utilizzato è quello di diverse città collegate tra loro.</text:p>
      <text:p text:style-name="P145"/>
      <text:p text:style-name="P146">Grafo:</text:p>
      <text:p text:style-name="P52"/>
      <text:p text:style-name="P52"><draw:frame draw:style-name="fr1" draw:name="Immagine28" text:anchor-type="char" svg:x="-0.559cm" svg:y="0.157cm" svg:width="18.766cm" svg:height="10.236cm" draw:z-index="27"><draw:image xlink:href="Pictures/100000010000058000000300303EF92011295569.png" xlink:type="simple" xlink:show="embed" xlink:actuate="onLoad" draw:mime-type="image/png"/></draw:frame></text:p>
      <text:p text:style-name="P52"/>
      <text:p text:style-name="P51"/>
      <text:p text:style-name="P51"/>
      <text:h text:style-name="P24" text:outline-level="2"/>
      <text:h text:style-name="P24" text:outline-level="2">Strumenti utilizzati</text:h>
      <text:p text:style-name="P13"/>
      <text:p text:style-name="P147">Algoritmo di ricerca informato A* <text:span text:style-name="T108">[10]</text:span></text:p>
      <text:h text:style-name="P24" text:outline-level="2">Decisioni di Progetto</text:h>
      <text:p text:style-name="P25"/>
      <text:p text:style-name="P148">Come funzione di costo <text:span text:style-name="T134">tra nodi vicini</text:span> è usata la distanza <text:span text:style-name="T81">in Km</text:span> tra <text:span text:style-name="T134">essi.</text:span></text:p>
      <text:p text:style-name="P148"/>
      <text:p text:style-name="P148">Come funzione euristica è <text:span text:style-name="T84">stata </text:span>usata la distanza euclidea tra punto x e goal h <text:span text:style-name="T82">(distanza in linea d’aria)</text:span>. Questa è ammissibile poiché sempre &lt;= del percorso più breve tra punto x e goal h. </text:p>
      <text:p text:style-name="P25"/>
      <text:h text:style-name="P24" text:outline-level="2"><text:soft-page-break/>Valutazione</text:h>
      <text:p text:style-name="P25"/>
      <text:p text:style-name="P53"/>
      <text:p text:style-name="P7"/>
      <text:p text:style-name="P7"><draw:frame draw:style-name="fr3" draw:name="Immagine29" text:anchor-type="char" svg:width="15.076cm" svg:height="5.634cm" draw:z-index="28"><draw:image xlink:href="Pictures/10000000000002E00000011314926EA58251E413.png" xlink:type="simple" xlink:show="embed" xlink:actuate="onLoad" draw:mime-type="image/png"/></draw:frame></text:p>
      <text:p text:style-name="P7"/>
      <text:p text:style-name="P7"/>
      <text:p text:style-name="P7"/>
      <text:p text:style-name="P149">L’algoritmo restituisce il percorso più breve specificando la distanza in Km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1">Ragionamento proposizionale: diagnosi basata su consistenza con clausole di Horn<text:span text:style-name="T118">(4)</text:span></text:h>
      <text:p text:style-name="P27"/>
      <text:h text:style-name="P26" text:outline-level="2">Sommario</text:h>
      <text:p text:style-name="P150">E’ stata usato la diagnosi basata su consistenza per diagnosticare le possibil<text:span text:style-name="T135">i</text:span> cause di guasti al sistema meccanico per l’elaborazione pacchi. La KB è stata implementata in prolog.</text:p>
      <text:h text:style-name="P68" text:outline-level="2"/>
      <text:p text:style-name="P151"/>
      <text:p text:style-name="P152">Sistema meccanico:</text:p>
      <text:p text:style-name="P54"><draw:frame draw:style-name="fr1" draw:name="Immagine30" text:anchor-type="char" svg:x="-1.265cm" svg:y="0.288cm" svg:width="19.599cm" svg:height="12.203cm" draw:z-index="29"><draw:image xlink:href="Pictures/1000000100000B04000006DCB6FAFBAEEAE4A1F9.png" xlink:type="simple" xlink:show="embed" xlink:actuate="onLoad" draw:mime-type="image/png"/></draw:frame></text:p>
      <text:p text:style-name="P54"/>
      <text:p text:style-name="P54"/>
      <text:p text:style-name="P54"/>
      <text:p text:style-name="P27"/>
      <text:h text:style-name="P26" text:outline-level="2">Strumenti utilizzati</text:h>
      <text:p text:style-name="P93"><text:span text:style-name="T87">E’ stato usato un algoritmo </text:span><text:span text:style-name="T88">di tipo </text:span><text:span text:style-name="T8">A</text:span><text:span text:style-name="T3">ssumption-based truth maintenance system (ATMS)</text:span>. <text:span text:style-name="T109">[11]</text:span></text:p>
      <text:p text:style-name="P94"><text:span text:style-name="T85">L’algoritmo implementato in prolog </text:span><text:span text:style-name="T87">usa un approcio dimostrativo di tipo</text:span><text:span text:style-name="T85"> </text:span>bottom-up <text:span text:style-name="T87">con</text:span> assum<text:span text:style-name="T86">ibili e clausole di Horn</text:span> <text:s/><text:span text:style-name="T90">e atomi di tipo askable.</text:span></text:p>
      <text:p text:style-name="P27"><text:soft-page-break/></text:p>
      <text:h text:style-name="P26" text:outline-level="2">Decisioni di Progetto</text:h>
      <text:p text:style-name="P27"/>
      <text:p text:style-name="P27"/>
      <text:p text:style-name="P27"/>
      <text:p text:style-name="P193">Struttura KB</text:p>
      <text:p text:style-name="P55"/>
      <text:p text:style-name="P63"><text:span text:style-name="Source_20_Text"><text:span text:style-name="T42">regola(Obiettivo, ListaD</text:span></text:span><text:span text:style-name="Source_20_Text"><text:span text:style-name="T43">ipen</text:span></text:span><text:span text:style-name="Source_20_Text"><text:span text:style-name="T42">denze)</text:span></text:span><text:span text:style-name="T113">: Rappresenta la topologia del circuito .</text:span></text:p>
      <text:p text:style-name="P63"><text:span text:style-name="Source_20_Text"><text:span text:style-name="T111"/></text:span></text:p>
      <text:p text:style-name="P63"><text:span text:style-name="Source_20_Text"><text:span text:style-name="T41">assumibile(Componente)</text:span></text:span><text:span text:style-name="T111">: Identifica i componenti fisici che </text:span><text:span text:style-name="T113">vengono assunti come veri (funzionanti).</text:span></text:p>
      <text:p text:style-name="P220">Gli assumibili sono :</text:p>
      <text:p text:style-name="P221">[ok_int_quadro_A", "ok_int_quadro_B", "ok_deviatore_flusso", "ok_chiave_manutenzione", "ok_interruttore_computer", "ok_motore", "ok_valvola_aria", "rete_elettrica_stabilimento"]</text:p>
      <text:p text:style-name="P221"/>
      <text:p text:style-name="P222"><text:span text:style-name="T9">Vincoli di Integrita:</text:span><text:span text:style-name="T89"> </text:span>Sono le regole che definiscono cosa costituisce un'anomalia per il sistema</text:p>
      <text:p text:style-name="P226">regola(contraddizione, [nastro_fermo, nastro_attivo]).</text:p>
      <text:p text:style-name="P226">regola(contraddizione, [spingitore_bloccato, spingitore_attivo]).</text:p>
      <text:p text:style-name="P221"/>
      <text:p text:style-name="P223"><text:span text:style-name="T3">Askables:</text:span> viene chiesto la stato di attività di alcune componenti</text:p>
      <text:p text:style-name="P227"><text:span text:style-name="T91">r</text:span>egola(osservazione,[])</text:p>
      <text:p text:style-name="P224">E stato osservato che la direzione del nastro è nord, <text:span text:style-name="T92">quindi viene aggiunta</text:span></text:p>
      <text:p text:style-name="P223"><text:s/>regola(direzione_nord,[])</text:p>
      <text:p text:style-name="P221"/>
      <text:p text:style-name="P221"/>
      <text:p text:style-name="P221"/>
      <text:p text:style-name="P221"/>
      <text:p text:style-name="P221"/>
      <text:p text:style-name="P221"/>
      <text:p text:style-name="P225"><text:soft-page-break/>Regole per implementazione algoritmo</text:p>
      <text:p text:style-name="P225"/>
      <text:p text:style-name="P221"><text:span text:style-name="T3"><text:s/>1. </text:span>Caso Base: Nessun obiettivo da dimostrare, nessuna assunzione accumulata.</text:p>
      <text:p text:style-name="P226">risolvi([], []).</text:p>
      <text:p text:style-name="P221"/>
      <text:p text:style-name="P221"><text:span text:style-name="T3">2.</text:span> Se l'elemento corrente è un assumibile, </text:p>
      <text:p text:style-name="P221"><text:s/>lo mette nella lista dei sospetti (AssResto) e continua.</text:p>
      <text:p text:style-name="P226">risolvi([X|Resto], [X|AssResto]) :- </text:p>
      <text:p text:style-name="P226"><text:s text:c="4"/>assumibile(X), !, </text:p>
      <text:p text:style-name="P226"><text:s text:c="4"/>risolvi(Resto, AssResto).</text:p>
      <text:p text:style-name="P221"/>
      <text:p text:style-name="P221"><text:span text:style-name="T3"><text:s/>3.</text:span> <text:s/>Se l'elemento è un nodo , cerca la regola corrispondente,</text:p>
      <text:p text:style-name="P221">sostituisce l'obiettivo con il suo corpo <text:s/>e continua <text:span text:style-name="T96">ricorsivamente la ricerca</text:span>.</text:p>
      <text:p text:style-name="P226">risolvi([Obiettivo|Resto], Assunzioni) :- </text:p>
      <text:p text:style-name="P226"><text:s text:c="4"/>regola(Obiettivo, Corpo), </text:p>
      <text:p text:style-name="P226"><text:s text:c="4"/>risolvi(Corpo, AssCorpo), </text:p>
      <text:p text:style-name="P226"><text:s text:c="4"/>risolvi(Resto, AssResto), </text:p>
      <text:p text:style-name="P226"><text:s text:c="4"/>append(AssCorpo, AssResto, Assunzioni).</text:p>
      <text:p text:style-name="P153"/>
      <text:p text:style-name="P178">4. <text:span text:style-name="T29">Inizia la ricerca a partire dalla contraddizione</text:span></text:p>
      <text:p text:style-name="P178"><text:span text:style-name="T29"/></text:p>
      <text:p text:style-name="P198">trova_conflitto(Conflitto) :- risolvi([contraddizione], Conflitto). </text:p>
      <text:p text:style-name="P154"/>
      <text:p text:style-name="P154"/>
      <text:p text:style-name="P154"/>
      <text:p text:style-name="P154">Per la diagnosi si fa query per il confitto :trova_conflitto(Conflitto)</text:p>
      <text:p text:style-name="P56"/>
      <text:h text:style-name="P26" text:outline-level="2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P26" text:outline-level="2">Valutazione</text:h>
      <text:p text:style-name="P27"/>
      <text:p text:style-name="P155">Pannello per chiedere all’utente gli atomi askables ed le anomalie riscontrate</text:p>
      <text:p text:style-name="P57"/>
      <text:p text:style-name="P7"/>
      <text:p text:style-name="P7"/>
      <text:p text:style-name="P7"><draw:frame draw:style-name="fr2" draw:name="Immagine31" text:anchor-type="char" svg:width="14.113cm" svg:height="7.908cm" draw:z-index="30"><draw:image xlink:href="Pictures/10000000000002B100000182D875D1EEE6B065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magine32" text:anchor-type="char" svg:x="0.252cm" svg:y="1.887cm" svg:width="17cm" svg:height="6.641cm" draw:z-index="31"><draw:image xlink:href="Pictures/100000000000039C00000169339D5AC3C7354EF4.png" xlink:type="simple" xlink:show="embed" xlink:actuate="onLoad" draw:mime-type="image/png"/></draw:frame></text:p>
      <text:p text:style-name="P89"/>
      <text:p text:style-name="P156">Esempio 1</text:p>
      <text:p text:style-name="P7"/>
      <text:p text:style-name="P7"/>
      <text:p text:style-name="P7"/>
      <text:p text:style-name="P156"><text:soft-page-break/></text:p>
      <text:p text:style-name="P156"/>
      <text:p text:style-name="P156"/>
      <text:p text:style-name="P156">Esempio 2</text:p>
      <text:p text:style-name="P7"/>
      <text:p text:style-name="P7"><draw:frame draw:style-name="fr2" draw:name="Immagine33" text:anchor-type="char" svg:width="16.736cm" svg:height="6.084cm" draw:z-index="32"><draw:image xlink:href="Pictures/1000000000000331000001296F9FE426C1FA40F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1"><text:soft-page-break/>Conclusioni</text:h>
      <text:p text:style-name="P7"/>
      <text:p text:style-name="P7"/>
      <text:p text:style-name="P7"/>
      <text:p text:style-name="P179">Considerazioni:</text:p>
      <text:p text:style-name="P179"/>
      <text:p text:style-name="P158">In conclusione è stato utilizzato un Random Forest con ottime performance per la segmentazione ,la rete bayesiana permette di guidare il decision making potendo predire i valori più probabili per gli ordini, A* star permette di trovare il percorso più corto per una consegna , e il sistema di diagnostica in caso di anomalia del sistema permette di ricondursi alle possibile cause.</text:p>
      <text:p text:style-name="P157"/>
      <text:p text:style-name="P179">Sviluppi:</text:p>
      <text:p text:style-name="P179"/>
      <text:p text:style-name="P160">Possibili sviluppi sono :</text:p>
      <text:list xml:id="list4056815886" text:style-name="L20">
        <text:list-item>
          <text:p text:style-name="P161"><text:span text:style-name="T124">L</text:span>a <text:span text:style-name="T97">diagnosi</text:span> delle anomalie legate alla linea di assemblaggio </text:p>
        </text:list-item>
        <text:list-item>
          <text:p text:style-name="P161"><text:span text:style-name="T124">L’</text:span> utilizzo di algor<text:span text:style-name="T102">itmi </text:span>per CSPs per gestire scheduling ottimale dei turni dei dipendenti <text:span text:style-name="T98">in</text:span> magazzino</text:p>
        </text:list-item>
        <text:list-item>
          <text:p text:style-name="P161"><text:span text:style-name="T99">Utilizza</text:span><text:span text:style-name="T100">re</text:span><text:span text:style-name="T99"> <text:s/>una Ontologia basata su Knowledge graphs </text:span><text:span text:style-name="T100">come ad esempio Wikidata </text:span><text:span text:style-name="T99">per codificare la conoscenza sui prodotti in magazzino ed effettuare ragionamento </text:span><text:span text:style-name="T101">per suggerire prodotti </text:span><text:span text:style-name="T125">logicamente </text:span><text:span text:style-name="T101">co</text:span><text:span text:style-name="T126">rrelati</text:span><text:span text:style-name="T101"> o simili a quelli venduti.</text:span></text:p>
        </text:list-item>
      </text:list>
      <text:p text:style-name="P1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64" text:outline-level="1"><text:soft-page-break/>Riferimenti Bibliografici</text:h>
      <text:p text:style-name="P8"/>
      <text:p text:style-name="P8"/>
      <text:p text:style-name="P61">Il riferimento è contenuto all’interno delle seguenti pagine.</text:p>
      <text:p text:style-name="P60">[1] <text:a xlink:type="simple" xlink:href="https://artint.info/3e/html/ArtInt3e.Ch10.S3.html" text:style-name="Internet_20_link" text:visited-style-name="Visited_20_Internet_20_Link">https://artint.info/3e/html/ArtInt3e.Ch10.S3.html</text:a></text:p>
      <text:p text:style-name="P60">[2] <text:a xlink:type="simple" xlink:href="https://en.wikipedia.org/wiki/Principal_component_analysis" text:style-name="Internet_20_link" text:visited-style-name="Visited_20_Internet_20_Link">https://en.wikipedia.org/wiki/Principal_component_analysis</text:a></text:p>
      <text:p text:style-name="P60">[3] <text:a xlink:type="simple" xlink:href="https://en.wikipedia.org/wiki/K-nearest_neighbors_algorithm" text:style-name="Internet_20_link" text:visited-style-name="Visited_20_Internet_20_Link">https://en.wikipedia.org/wiki/K-nearest_neighbors_algorithm</text:a></text:p>
      <text:p text:style-name="P60">[4] <text:a xlink:type="simple" xlink:href="https://artint.info/3e/html/ArtInt3e.Ch7.S5.html" text:style-name="Internet_20_link" text:visited-style-name="Visited_20_Internet_20_Link">https://artint.info/3e/html/ArtInt3e.Ch7.S5.html</text:a></text:p>
      <text:p text:style-name="P60">[5] <text:a xlink:type="simple" xlink:href="https://artint.info/3e/html/ArtInt3e.Ch7.S3.html" text:style-name="Internet_20_link" text:visited-style-name="Visited_20_Internet_20_Link">https://artint.info/3e/html/ArtInt3e.Ch7.S3.html</text:a></text:p>
      <text:p text:style-name="P60">[6] <text:a xlink:type="simple" xlink:href="https://en.wikipedia.org/wiki/K-d_tree" text:style-name="Internet_20_link" text:visited-style-name="Visited_20_Internet_20_Link">https://en.wikipedia.org/wiki/K-d_tree</text:a></text:p>
      <text:p text:style-name="P60">[7] <text:a xlink:type="simple" xlink:href="https://en.wikipedia.org/wiki/Conjugate_gradient_method" text:style-name="Internet_20_link" text:visited-style-name="Visited_20_Internet_20_Link">https://en.wikipedia.org/wiki/Conjugate_gradient_method</text:a></text:p>
      <text:p text:style-name="P60">[8] <text:a xlink:type="simple" xlink:href="https://en.wikipedia.org/wiki/Maximum_likelihood_estimation" text:style-name="Internet_20_link" text:visited-style-name="Visited_20_Internet_20_Link">https://en.wikipedia.org/wiki/Maximum_likelihood_estimation</text:a></text:p>
      <text:p text:style-name="P60">[9] <text:a xlink:type="simple" xlink:href="https://artint.info/3e/html/ArtInt3e.Ch9.S5.html" text:style-name="Internet_20_link" text:visited-style-name="Visited_20_Internet_20_Link">https://artint.info/3e/html/ArtInt3e.Ch9.S5.html</text:a></text:p>
      <text:p text:style-name="P60">[10] <text:a xlink:type="simple" xlink:href="https://artint.info/3e/html/ArtInt3e.Ch3.S6.html" text:style-name="Internet_20_link" text:visited-style-name="Visited_20_Internet_20_Link">https://artint.info/3e/html/ArtInt3e.Ch3.S6.html</text:a></text:p>
      <text:p text:style-name="P60">[11] <text:a xlink:type="simple" xlink:href="https://artint.info/3e/html/ArtInt3e.Ch5.S6.html" text:style-name="Internet_20_link" text:visited-style-name="Visited_20_Internet_20_Link">https://artint.info/3e/html/ArtInt3e.Ch5.S6.html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5:13:49.046178599</meta:creation-date>
    <meta:generator>LibreOffice/7.3.7.2$Linux_X86_64 LibreOffice_project/30$Build-2</meta:generator>
    <dc:date>2026-06-21T12:41:36.055780295</dc:date>
    <meta:editing-duration>PT14H12M5S</meta:editing-duration>
    <meta:editing-cycles>349</meta:editing-cycles>
    <meta:document-statistic meta:table-count="0" meta:image-count="34" meta:object-count="0" meta:page-count="37" meta:paragraph-count="298" meta:word-count="2731" meta:character-count="18830" meta:non-whitespace-character-count="16346"/>
  </office:meta>
</office:document-meta>
</file>